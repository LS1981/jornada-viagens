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automatic-styles>
    <style:style style:name="P1" style:family="paragraph" style:parent-style-name="Heading_20_1">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ffffff" loext:opacity="100%" style:font-name="Open Sans" fo:letter-spacing="normal" fo:font-style="normal" fo:font-weight="normal"/>
    </style:style>
    <style:style style:name="P2" style:family="paragraph" style:parent-style-name="Heading_20_1">
      <style:paragraph-properties fo:margin-left="0cm" fo:margin-right="0cm" fo:text-align="justify" style:justify-single-word="false" fo:orphans="2" fo:widows="2" fo:text-indent="0cm" style:auto-text-indent="false" fo:padding="0cm" fo:border="none"/>
      <style:text-properties fo:font-variant="normal" fo:text-transform="none" fo:color="#ca4948" loext:opacity="100%" style:font-name="Open Sans" fo:letter-spacing="normal" fo:font-style="normal" fo:font-weight="normal"/>
    </style:style>
    <style:style style:name="P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ca4948" loext:opacity="100%" style:font-name="Source Serif Pro" fo:font-size="8.39999961853027pt" fo:letter-spacing="normal" fo:font-style="normal" fo:font-weight="bold" style:font-name-asian="NSimSun1" style:font-size-asian="24pt" style:font-weight-asian="bold" style:font-name-complex="Lucida Sans1" style:font-size-complex="24pt" style:font-weight-complex="bold" loext:padding="0cm" loext:border="none"/>
    </style:style>
    <style:style style:name="P4" style:family="paragraph" style:parent-style-name="Heading_20_2">
      <style:paragraph-properties fo:margin-left="0cm" fo:margin-right="0cm" fo:margin-top="0.953cm" fo:margin-bottom="0cm" style:contextual-spacing="false" fo:text-align="justify" style:justify-single-word="false" fo:orphans="2" fo:widows="2" fo:text-indent="0cm" style:auto-text-indent="false" fo:padding="0cm" fo:border="none"/>
      <style:text-properties fo:font-variant="normal" fo:text-transform="none" style:use-window-font-color="true" loext:opacity="0%" style:font-name="Open sans" fo:letter-spacing="normal" fo:font-style="normal" fo:font-weight="normal"/>
    </style:style>
    <style:style style:name="P5" style:family="paragraph" style:parent-style-name="Text_20_body">
      <style:paragraph-properties fo:margin-left="0cm" fo:margin-right="0cm" fo:margin-top="0cm" fo:margin-bottom="0cm" style:contextual-spacing="false" fo:line-height="200%" fo:text-align="justify" style:justify-single-word="false" fo:orphans="2" fo:widows="2" fo:text-indent="0cm" style:auto-text-indent="false" fo:padding="0cm" fo:border="none"/>
      <style:text-properties fo:font-variant="normal" fo:text-transform="none" style:use-window-font-color="true" loext:opacity="0%" style:font-name="Open sans" fo:letter-spacing="normal" fo:font-style="normal" fo:font-weight="normal"/>
    </style:style>
    <style:style style:name="P6"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style:use-window-font-color="true" loext:opacity="0%" style:font-name="Source Serif Pro" fo:font-size="10.8000001907349pt" fo:letter-spacing="normal" fo:font-style="normal" fo:font-weight="normal"/>
    </style:style>
    <style:style style:name="P7"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style:use-window-font-color="true" loext:opacity="0%" style:font-name="Source Serif Pro" fo:font-size="10.8000001907349pt" fo:letter-spacing="normal" fo:font-style="normal" fo:font-weight="normal"/>
    </style:style>
    <style:style style:name="P8" style:family="paragraph" style:parent-style-name="Heading_20_2">
      <style:paragraph-properties fo:margin-left="0cm" fo:margin-right="0cm" fo:margin-top="0cm" fo:margin-bottom="0cm" style:contextual-spacing="false" fo:orphans="2" fo:widows="2" fo:text-indent="0cm" style:auto-text-indent="false" fo:padding="0cm" fo:border="none"/>
    </style:style>
    <style:style style:name="P9" style:family="paragraph" style:parent-style-name="Heading_20_2">
      <style:paragraph-properties fo:margin-left="0cm" fo:margin-right="0cm" fo:text-align="justify" style:justify-single-word="false" fo:orphans="2" fo:widows="2" fo:text-indent="0cm" style:auto-text-indent="false" fo:padding="0cm" fo:border="none"/>
    </style:style>
    <style:style style:name="P10" style:family="paragraph" style:parent-style-name="Heading_20_2">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1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12" style:family="paragraph" style:parent-style-name="Text_20_body">
      <style:paragraph-properties fo:text-align="justify" style:justify-single-word="false"/>
      <style:text-properties style:use-window-font-color="true" loext:opacity="0%" fo:font-weight="bold" officeooo:rsid="000b969f" officeooo:paragraph-rsid="000b969f" style:font-weight-asian="bold" style:font-weight-complex="bold"/>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style:use-window-font-color="true" loext:opacity="0%"/>
    </style:style>
    <style:style style:name="P14" style:family="paragraph" style:parent-style-name="Text_20_body">
      <style:paragraph-properties fo:margin-left="0cm" fo:margin-right="0cm" fo:text-align="justify" style:justify-single-word="false" fo:orphans="2" fo:widows="2" fo:text-indent="0cm" style:auto-text-indent="false" fo:padding="0cm" fo:border="none"/>
      <style:text-properties style:use-window-font-color="true" loext:opacity="0%"/>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6" style:family="paragraph" style:parent-style-name="Heading_20_1">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874f41" loext:opacity="100%" officeooo:paragraph-rsid="000e2b81"/>
    </style:style>
    <style:style style:name="P17" style:family="paragraph" style:parent-style-name="Heading_20_1">
      <style:paragraph-properties fo:margin-left="0cm" fo:margin-right="0cm" fo:text-align="justify" style:justify-single-word="false" fo:orphans="2" fo:widows="2" fo:text-indent="0cm" style:auto-text-indent="false" fo:padding="0cm" fo:border="none"/>
      <style:text-properties fo:color="#87172f" loext:opacity="100%" fo:font-size="12pt" fo:letter-spacing="normal" style:font-size-asian="12pt" style:font-size-complex="12pt" loext:padding="0cm" loext:border="none"/>
    </style:style>
    <style:style style:name="P18" style:family="paragraph" style:parent-style-name="Heading_20_2">
      <style:paragraph-properties fo:margin-left="0cm" fo:margin-right="0cm" fo:margin-top="0.953cm" fo:margin-bottom="0cm" style:contextual-spacing="false" fo:text-align="justify" style:justify-single-word="false" fo:orphans="2" fo:widows="2" fo:text-indent="0cm" style:auto-text-indent="false" fo:padding="0cm" fo:border="none"/>
      <style:text-properties fo:font-variant="normal" fo:text-transform="none" style:use-window-font-color="true" loext:opacity="0%" style:font-name="Open sans" fo:letter-spacing="normal" fo:font-style="normal" fo:font-weight="normal"/>
    </style:style>
    <style:style style:name="P19" style:family="paragraph" style:parent-style-name="Heading_20_2">
      <style:paragraph-properties fo:margin-left="0cm" fo:margin-right="0cm" fo:margin-top="0.953cm" fo:margin-bottom="0cm" style:contextual-spacing="false" fo:orphans="2" fo:widows="2" fo:text-indent="0cm" style:auto-text-indent="false" fo:padding="0cm" fo:border="none"/>
      <style:text-properties fo:font-variant="normal" fo:text-transform="none" style:use-window-font-color="true" loext:opacity="0%" style:font-name="Open sans" fo:letter-spacing="normal" fo:font-style="normal" fo:font-weight="normal"/>
    </style:style>
    <style:style style:name="P20" style:family="paragraph" style:parent-style-name="Heading_20_2">
      <style:paragraph-properties fo:margin-left="0cm" fo:margin-right="0cm" fo:margin-top="0.953cm" fo:margin-bottom="0cm" style:contextual-spacing="false" style:line-height-at-least="0.656cm" fo:text-align="justify" style:justify-single-word="false" fo:orphans="2" fo:widows="2" fo:text-indent="0cm" style:auto-text-indent="false" fo:padding="0cm" fo:border="none"/>
      <style:text-properties fo:font-variant="normal" fo:text-transform="none" style:use-window-font-color="true" loext:opacity="0%" style:font-name="Open sans" fo:font-size="10.8000001907349pt" fo:letter-spacing="normal" fo:font-style="normal" fo:font-weight="bold" loext:padding="0cm" loext:border="none"/>
    </style:style>
    <style:style style:name="P21" style:family="paragraph" style:parent-style-name="Heading_20_2">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font-variant="normal" fo:text-transform="none" style:use-window-font-color="true" loext:opacity="0%" style:font-name="Open sans" fo:font-size="10.8000001907349pt" fo:letter-spacing="normal" fo:font-style="normal" fo:font-weight="bold" style:font-weight-asian="bold" style:font-weight-complex="bold" loext:padding="0cm" loext:border="none"/>
    </style:style>
    <style:style style:name="P22" style:family="paragraph" style:parent-style-name="Heading_20_2">
      <style:paragraph-properties fo:margin-left="0cm" fo:margin-right="0cm" fo:line-height="150%" fo:text-align="justify" style:justify-single-word="false" fo:orphans="2" fo:widows="2" fo:text-indent="0cm" style:auto-text-indent="false" fo:padding="0cm" fo:border="none"/>
      <style:text-properties fo:font-variant="normal" fo:text-transform="none" style:use-window-font-color="true" loext:opacity="0%" style:font-name="Open sans" fo:font-size="10.8000001907349pt" fo:letter-spacing="normal" fo:font-style="normal" fo:font-weight="bold" style:font-weight-asian="bold" style:font-weight-complex="bold"/>
    </style:style>
    <style:style style:name="P23" style:family="paragraph" style:parent-style-name="Heading_20_2">
      <style:paragraph-properties fo:margin-left="0cm" fo:margin-right="0cm" fo:margin-top="0.953cm" fo:margin-bottom="0cm" style:contextual-spacing="false" fo:text-align="justify" style:justify-single-word="false" fo:orphans="2" fo:widows="2" fo:text-indent="0cm" style:auto-text-indent="false" fo:padding="0cm" fo:border="none"/>
    </style:style>
    <style:style style:name="P24" style:family="paragraph" style:parent-style-name="Heading_20_2">
      <style:paragraph-properties fo:line-height="150%" fo:text-align="justify" style:justify-single-word="false"/>
      <style:text-properties style:use-window-font-color="true" loext:opacity="0%" fo:font-size="14pt" fo:font-weight="bold" officeooo:paragraph-rsid="000b969f" style:font-size-asian="14pt" style:font-weight-asian="bold" style:font-size-complex="14pt" style:font-weight-complex="bold"/>
    </style:style>
    <style:style style:name="P25" style:family="paragraph" style:parent-style-name="Heading_20_2">
      <style:paragraph-properties fo:margin-left="0cm" fo:margin-right="0cm" fo:margin-top="0.148cm" fo:margin-bottom="0cm" style:contextual-spacing="false" style:line-height-at-least="0.656cm" fo:text-align="justify" style:justify-single-word="false" fo:orphans="2" fo:widows="2" fo:text-indent="0cm" style:auto-text-indent="false" fo:padding="0cm" fo:border="none"/>
    </style:style>
    <style:style style:name="P26" style:family="paragraph" style:parent-style-name="Preformatted_20_Text">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27" style:family="paragraph" style:parent-style-name="Preformatted_20_Text">
      <style:paragraph-properties fo:margin-left="0cm" fo:margin-right="0cm" fo:text-align="justify" style:justify-single-word="false" fo:orphans="2" fo:widows="2" fo:text-indent="0cm" style:auto-text-indent="false" fo:padding="0cm" fo:border="none"/>
    </style:style>
    <style:style style:name="P28" style:family="paragraph" style:parent-style-name="Preformatted_20_Text">
      <style:paragraph-properties fo:margin-left="0cm" fo:margin-right="0cm" fo:margin-top="1.053cm" fo:margin-bottom="0.101cm" style:contextual-spacing="false" fo:text-align="justify" style:justify-single-word="false" fo:orphans="2" fo:widows="2" fo:text-indent="0cm" style:auto-text-indent="false" fo:padding="0cm" fo:border="none"/>
    </style:style>
    <style:style style:name="P29" style:family="paragraph" style:parent-style-name="Preformatted_20_Text">
      <style:paragraph-properties fo:margin-left="0cm" fo:margin-right="0cm" fo:margin-top="0.953cm" fo:margin-bottom="0cm" style:contextual-spacing="false" fo:text-align="justify" style:justify-single-word="false" fo:orphans="2" fo:widows="2" fo:text-indent="0cm" style:auto-text-indent="false" fo:padding="0cm" fo:border="none"/>
    </style:style>
    <style:style style:name="P30"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style>
    <style:style style:name="P31" style:family="paragraph" style:parent-style-name="Preformatted_20_Text">
      <loext:graphic-properties draw:fill="solid" draw:fill-color="#272822" draw:opacity="100%"/>
      <style:paragraph-properties fo:margin-top="0cm" fo:margin-bottom="0cm" style:contextual-spacing="false" fo:orphans="2" fo:widows="2" fo:background-color="#272822"/>
    </style:style>
    <style:style style:name="P32" style:family="paragraph" style:parent-style-name="Preformatted_20_Text">
      <style:paragraph-properties fo:margin-left="0cm" fo:margin-right="0cm" fo:margin-top="0cm" fo:margin-bottom="0cm" style:contextual-spacing="false" style:line-height-at-least="0.656cm" fo:text-align="justify" style:justify-single-word="false" fo:orphans="2" fo:widows="2" fo:text-indent="0cm" style:auto-text-indent="false" fo:padding="0cm" fo:border="none"/>
      <style:text-properties fo:font-variant="normal" fo:text-transform="none" style:use-window-font-color="true" loext:opacity="0%" style:font-name="Source Serif Pro" fo:font-size="10.8000001907349pt" fo:letter-spacing="normal" fo:font-style="normal" fo:font-weight="normal" loext:padding="0cm" loext:border="none"/>
    </style:style>
    <style:style style:name="P33" style:family="paragraph" style:parent-style-name="Preformatted_20_Text">
      <style:paragraph-properties fo:margin-left="0cm" fo:margin-right="0cm" fo:line-height="150%" fo:text-align="justify" style:justify-single-word="false" fo:orphans="2" fo:widows="2" fo:text-indent="0cm" style:auto-text-indent="false" fo:padding="0cm" fo:border="none"/>
      <style:text-properties fo:font-variant="normal" fo:text-transform="none" style:use-window-font-color="true" loext:opacity="0%" style:font-name="Source Serif Pro" fo:font-size="10.8000001907349pt" fo:letter-spacing="normal" fo:font-style="normal" fo:font-weight="normal" style:font-weight-asian="normal" style:font-weight-complex="normal"/>
    </style:style>
    <style:style style:name="P34" style:family="paragraph" style:parent-style-name="Preformatted_20_Text">
      <style:paragraph-properties fo:margin-left="0cm" fo:margin-right="0cm" fo:text-align="start" style:justify-single-word="false" fo:orphans="2" fo:widows="2" fo:text-indent="0cm" style:auto-text-indent="false" fo:padding="0cm" fo:border="none"/>
      <style:text-properties fo:font-variant="normal" fo:text-transform="none" style:use-window-font-color="true" loext:opacity="0%" style:font-name="Source Serif Pro" fo:font-size="10.8000001907349pt" fo:letter-spacing="normal" fo:font-style="normal" fo:font-weight="bold" style:font-weight-asian="bold" style:font-weight-complex="bold"/>
    </style:style>
    <style:style style:name="P35" style:family="paragraph" style:parent-style-name="Preformatted_20_Text">
      <style:paragraph-properties fo:margin-left="0cm" fo:margin-right="0cm" fo:line-height="150%" fo:text-align="justify" style:justify-single-word="false" fo:orphans="2" fo:widows="2" fo:text-indent="0cm" style:auto-text-indent="false" fo:padding="0cm" fo:border="none"/>
      <style:text-properties style:use-window-font-color="true" loext:opacity="0%" fo:font-weight="bold" style:font-weight-asian="bold" style:font-weight-complex="bold"/>
    </style:style>
    <style:style style:name="P36"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text-properties style:use-window-font-color="true" loext:opacity="0%" fo:font-weight="bold" style:font-weight-asian="bold" style:font-weight-complex="bold"/>
    </style:style>
    <style:style style:name="P37"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text-properties fo:font-weight="bold" style:font-weight-asian="bold" style:font-weight-complex="bold"/>
    </style:style>
    <style:style style:name="P39" style:family="paragraph" style:parent-style-name="Standard">
      <style:paragraph-properties fo:line-height="150%" fo:text-align="justify" style:justify-single-word="false"/>
      <style:text-properties style:use-window-font-color="true" loext:opacity="0%" fo:font-weight="normal" officeooo:rsid="000b969f" officeooo:paragraph-rsid="000b969f" style:font-weight-asian="normal" style:font-weight-complex="normal"/>
    </style:style>
    <style:style style:name="P40" style:family="paragraph" style:parent-style-name="Standard">
      <style:text-properties fo:color="#1b6c3b" loext:opacity="100%" fo:font-weight="bold" officeooo:rsid="000b969f" officeooo:paragraph-rsid="000b969f" style:font-weight-asian="bold" style:font-weight-complex="bold"/>
    </style:style>
    <style:style style:name="P41" style:family="paragraph" style:parent-style-name="Text_20_body" style:list-style-name="L1">
      <style:paragraph-properties fo:margin-left="0cm" fo:margin-right="0cm" fo:orphans="2" fo:widows="2" fo:text-indent="0cm" style:auto-text-indent="false" fo:padding="0cm" fo:border="none"/>
    </style:style>
    <style:style style:name="P42" style:family="paragraph" style:parent-style-name="Text_20_body" style:list-style-name="L2">
      <style:paragraph-properties fo:margin-left="0cm" fo:margin-right="0cm" fo:orphans="2" fo:widows="2" fo:text-indent="0cm" style:auto-text-indent="false" fo:padding="0cm" fo:border="none"/>
    </style:style>
    <style:style style:name="P43" style:family="paragraph" style:parent-style-name="Text_20_body" style:list-style-name="L3">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style:use-window-font-color="true" loext:opacity="0%" style:font-name="Source Serif Pro" fo:font-size="10.8000001907349pt" fo:letter-spacing="normal" fo:font-style="normal" fo:font-weight="normal"/>
    </style:style>
    <style:style style:name="P44" style:family="paragraph" style:parent-style-name="Text_20_body" style:list-style-name="L4">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style:use-window-font-color="true" loext:opacity="0%" style:font-name="Source Serif Pro" fo:font-size="10.8000001907349pt" fo:letter-spacing="normal" fo:font-style="normal" fo:font-weight="normal"/>
    </style:style>
    <style:style style:name="P4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style:use-window-font-color="true" loext:opacity="0%" style:font-name="Source Serif Pro" fo:font-size="10.8000001907349pt" fo:letter-spacing="normal" fo:font-style="normal" fo:font-weight="normal"/>
    </style:style>
    <style:style style:name="P46" style:family="paragraph" style:parent-style-name="Text_20_body">
      <style:paragraph-properties fo:margin-left="0cm" fo:margin-right="0cm" fo:margin-top="0cm" fo:margin-bottom="0cm" style:contextual-spacing="false" style:line-height-at-least="0.656cm" fo:text-align="justify" style:justify-single-word="false" fo:orphans="2" fo:widows="2" fo:text-indent="0cm" style:auto-text-indent="false" fo:padding="0cm" fo:border="none"/>
      <style:text-properties fo:font-variant="normal" fo:text-transform="none" style:use-window-font-color="true" loext:opacity="0%" style:font-name="Source Serif Pro" fo:font-size="10.8000001907349pt" fo:letter-spacing="normal" fo:font-style="normal" fo:font-weight="normal" loext:padding="0cm" loext:border="none"/>
    </style:style>
    <style:style style:name="P47"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font-variant="normal" fo:text-transform="none" style:use-window-font-color="true" loext:opacity="0%" style:font-name="Source Serif Pro" fo:font-size="10.8000001907349pt" fo:letter-spacing="normal" fo:font-style="normal" fo:font-weight="normal" loext:padding="0cm" loext:border="none"/>
    </style:style>
    <style:style style:name="P48"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font-variant="normal" fo:text-transform="none" style:use-window-font-color="true" loext:opacity="0%" style:font-name="Source Serif Pro" fo:font-size="10.8000001907349pt" fo:letter-spacing="normal" fo:font-style="normal" fo:font-weight="normal" officeooo:rsid="0011156a" officeooo:paragraph-rsid="0011156a" style:font-weight-asian="normal" style:font-weight-complex="normal" loext:padding="0cm" loext:border="none"/>
    </style:style>
    <style:style style:name="P49" style:family="paragraph" style:parent-style-name="Text_20_body">
      <style:paragraph-properties fo:margin-left="0cm" fo:margin-right="0cm" fo:line-height="150%" fo:text-align="justify" style:justify-single-word="false" fo:orphans="2" fo:widows="2" fo:text-indent="0cm" style:auto-text-indent="false" fo:padding="0cm" fo:border="none"/>
      <style:text-properties fo:font-variant="normal" fo:text-transform="none" style:use-window-font-color="true" loext:opacity="0%" style:font-name="Source Serif Pro" fo:font-size="10.8000001907349pt" fo:letter-spacing="normal" fo:font-style="normal" fo:font-weight="normal" style:font-weight-asian="normal" style:font-weight-complex="normal"/>
    </style:style>
    <style:style style:name="P5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style:use-window-font-color="true" loext:opacity="0%" style:font-name="Source Serif Pro" fo:font-size="10.8000001907349pt" fo:letter-spacing="normal" fo:font-style="normal" fo:font-weight="normal"/>
    </style:style>
    <style:style style:name="P51" style:family="paragraph" style:parent-style-name="Text_20_body">
      <style:paragraph-properties fo:margin-left="0cm" fo:margin-right="0cm" fo:line-height="150%" fo:text-align="justify" style:justify-single-word="false" fo:orphans="2" fo:widows="2" fo:text-indent="0cm" style:auto-text-indent="false" fo:padding="0cm" fo:border="none"/>
      <style:text-properties fo:font-variant="normal" fo:text-transform="none" style:use-window-font-color="true" loext:opacity="0%" style:font-name="Source Serif Pro" fo:font-size="10.8000001907349pt" fo:letter-spacing="normal" fo:font-style="normal" fo:font-weight="normal"/>
    </style:style>
    <style:style style:name="P5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style:use-window-font-color="true" loext:opacity="0%" style:font-name="Source Serif Pro" fo:font-size="10.8000001907349pt" fo:letter-spacing="normal" fo:font-style="normal" fo:font-weight="bold" style:font-weight-asian="bold" style:font-weight-complex="bold"/>
    </style:style>
    <style:style style:name="P53"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font-variant="normal" fo:text-transform="none" fo:color="#1b6c3b" loext:opacity="100%" style:font-name="Source Serif Pro" fo:font-size="14pt" fo:letter-spacing="normal" fo:font-style="normal" fo:font-weight="bold" officeooo:rsid="0011156a" officeooo:paragraph-rsid="0011156a" style:font-size-asian="14pt" style:font-weight-asian="bold" style:font-size-complex="14pt" style:font-weight-complex="bold" loext:padding="0cm" loext:border="none"/>
    </style:style>
    <style:style style:name="P54"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font-variant="normal" fo:text-transform="none" fo:color="#1b6c3b" loext:opacity="100%" style:font-name="Source Serif Pro" fo:font-size="14pt" fo:letter-spacing="normal" fo:font-style="normal" fo:font-weight="normal" officeooo:rsid="00114dbf" officeooo:paragraph-rsid="00114dbf" style:font-size-asian="14pt" style:font-weight-asian="normal" style:font-size-complex="14pt" style:font-weight-complex="normal" loext:padding="0cm" loext:border="none"/>
    </style:style>
    <style:style style:name="P55" style:family="paragraph" style:parent-style-name="Text_20_body" style:list-style-name="L3">
      <style:paragraph-properties fo:margin-left="0cm" fo:margin-right="0cm" fo:text-align="justify" style:justify-single-word="false" fo:orphans="2" fo:widows="2" fo:text-indent="0cm" style:auto-text-indent="false" fo:padding="0cm" fo:border="none"/>
    </style:style>
    <style:style style:name="P56" style:family="paragraph" style:parent-style-name="Text_20_body" style:list-style-name="L4">
      <style:paragraph-properties fo:margin-left="0cm" fo:margin-right="0cm" fo:text-align="justify" style:justify-single-word="false" fo:orphans="2" fo:widows="2" fo:text-indent="0cm" style:auto-text-indent="false" fo:padding="0cm" fo:border="none"/>
    </style:style>
    <style:style style:name="P5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58"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59" style:family="paragraph" style:parent-style-name="Text_20_body">
      <style:paragraph-properties fo:margin-left="0cm" fo:margin-right="0cm" fo:text-align="justify" style:justify-single-word="false" fo:orphans="2" fo:widows="2" fo:text-indent="0cm" style:auto-text-indent="false" fo:padding="0cm" fo:border="none"/>
      <style:text-properties style:use-window-font-color="true" loext:opacity="0%"/>
    </style:style>
    <style:style style:name="P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style:use-window-font-color="true" loext:opacity="0%"/>
    </style:style>
    <style:style style:name="P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style:use-window-font-color="true" loext:opacity="0%" fo:font-weight="bold" style:font-weight-asian="bold" style:font-weight-complex="bold"/>
    </style:style>
    <style:style style:name="P62" style:family="paragraph" style:parent-style-name="Text_20_body">
      <style:paragraph-properties fo:line-height="150%" fo:text-align="justify" style:justify-single-word="false"/>
      <style:text-properties style:use-window-font-color="true" loext:opacity="0%" fo:font-weight="bold" officeooo:rsid="000b969f" officeooo:paragraph-rsid="000b969f" style:font-weight-asian="bold" style:font-weight-complex="bold"/>
    </style:style>
    <style:style style:name="P63" style:family="paragraph" style:parent-style-name="Text_20_body">
      <style:paragraph-properties fo:margin-left="0cm" fo:margin-right="0cm" fo:line-height="150%" fo:text-align="justify" style:justify-single-word="false" fo:orphans="2" fo:widows="2" fo:text-indent="0cm" style:auto-text-indent="false" fo:padding="0cm" fo:border="none"/>
      <style:text-properties style:use-window-font-color="true" loext:opacity="0%" fo:font-weight="normal" style:font-weight-asian="normal" style:font-weight-complex="normal"/>
    </style:style>
    <style:style style:name="P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65" style:family="paragraph" style:parent-style-name="Text_20_body">
      <style:paragraph-properties fo:margin-left="0cm" fo:margin-right="0cm" fo:margin-top="0cm" fo:margin-bottom="0cm" style:contextual-spacing="false" style:line-height-at-least="0.656cm" fo:text-align="justify" style:justify-single-word="false" fo:orphans="2" fo:widows="2" fo:text-indent="0cm" style:auto-text-indent="false" fo:padding="0cm" fo:border="none"/>
    </style:style>
    <style:style style:name="P66"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style>
    <style:style style:name="P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weight="bold" style:font-weight-asian="bold" style:font-weight-complex="bold"/>
    </style:style>
    <style:style style:name="P6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weight="bold" style:font-weight-asian="bold" style:font-weight-complex="bold"/>
    </style:style>
    <style:style style:name="T1" style:family="text">
      <style:text-properties style:font-name="Source Serif Pro" fo:font-size="10.8000001907349pt"/>
    </style:style>
    <style:style style:name="T2" style:family="text">
      <style:text-properties style:font-name="Source Serif Pro" fo:font-size="10.8000001907349pt" fo:font-weight="bold" loext:padding="0cm" loext:border="none"/>
    </style:style>
    <style:style style:name="T3" style:family="text">
      <style:text-properties style:font-name="Source Serif Pro" fo:font-size="10.8000001907349pt" fo:letter-spacing="normal" loext:padding="0cm" loext:border="none"/>
    </style:style>
    <style:style style:name="T4" style:family="text">
      <style:text-properties style:font-name="Source Serif Pro" fo:font-size="8.39999961853027pt" fo:font-weight="bold" loext:padding="0cm" loext:border="none"/>
    </style:style>
    <style:style style:name="T5" style:family="text">
      <style:text-properties style:font-name="Source Serif Pro" fo:background-color="#272822" loext:char-shading-value="0" loext:padding="0cm" loext:border="none"/>
    </style:style>
    <style:style style:name="T6" style:family="text">
      <style:text-properties fo:font-variant="normal" fo:text-transform="none" style:font-name="Source Serif Pro" fo:font-size="10.8000001907349pt" fo:letter-spacing="normal" fo:font-style="normal"/>
    </style:style>
    <style:style style:name="T7" style:family="text">
      <style:text-properties fo:font-variant="normal" fo:text-transform="none" style:font-name="Source Serif Pro" fo:font-size="10.8000001907349pt" fo:letter-spacing="normal" fo:font-style="normal" fo:font-weight="normal"/>
    </style:style>
    <style:style style:name="T8" style:family="text">
      <style:text-properties fo:font-variant="normal" fo:text-transform="none" style:font-name="Source Serif Pro" fo:font-size="10.8000001907349pt" fo:letter-spacing="normal" fo:font-style="normal" fo:font-weight="normal" loext:padding="0cm" loext:border="none"/>
    </style:style>
    <style:style style:name="T9" style:family="text">
      <style:text-properties fo:font-variant="normal" fo:text-transform="none" style:font-name="Source Serif Pro" fo:font-size="10.8000001907349pt" fo:letter-spacing="normal" fo:font-style="normal" fo:font-weight="normal" fo:background-color="#272822" loext:char-shading-value="0" loext:padding="0cm" loext:border="none"/>
    </style:style>
    <style:style style:name="T10" style:family="text">
      <style:text-properties fo:font-variant="normal" fo:text-transform="none" style:font-name="Source Serif Pro" fo:font-size="10.8000001907349pt" fo:letter-spacing="normal" fo:font-style="normal" fo:font-weight="normal" officeooo:rsid="000e2b81"/>
    </style:style>
    <style:style style:name="T11" style:family="text">
      <style:text-properties fo:font-variant="normal" fo:text-transform="none" style:font-name="Source Serif Pro" fo:font-size="10.8000001907349pt" fo:letter-spacing="normal" fo:font-style="normal" fo:font-weight="bold" loext:padding="0cm" loext:border="none"/>
    </style:style>
    <style:style style:name="T12" style:family="text">
      <style:text-properties fo:font-variant="normal" fo:text-transform="none" style:font-name="Source Serif Pro" fo:font-size="10.8000001907349pt" fo:letter-spacing="normal" fo:font-style="normal" fo:font-weight="bold" style:font-weight-asian="bold" style:font-weight-complex="bold"/>
    </style:style>
    <style:style style:name="T13" style:family="text">
      <style:text-properties fo:font-variant="normal" fo:text-transform="none" style:font-name="Source Serif Pro" fo:font-size="10.8000001907349pt" fo:letter-spacing="normal" fo:font-style="normal" loext:padding="0cm" loext:border="none"/>
    </style:style>
    <style:style style:name="T14" style:family="text">
      <style:text-properties fo:font-variant="normal" fo:text-transform="none" style:font-name="Source Serif Pro" fo:font-size="10.8000001907349pt" fo:letter-spacing="normal" fo:font-style="normal" fo:background-color="#272822" loext:char-shading-value="0" loext:padding="0cm" loext:border="none"/>
    </style:style>
    <style:style style:name="T15" style:family="text">
      <style:text-properties fo:font-variant="normal" fo:text-transform="none" style:font-name="Source Serif Pro" fo:font-size="10.8000001907349pt" fo:letter-spacing="normal" fo:font-style="normal" officeooo:rsid="000b969f" style:font-weight-asian="bold" style:font-weight-complex="bold"/>
    </style:style>
    <style:style style:name="T16" style:family="text">
      <style:text-properties fo:font-variant="normal" fo:text-transform="none" style:font-name="Source Serif Pro" fo:font-size="10.8000001907349pt" fo:letter-spacing="normal" fo:font-style="normal" officeooo:rsid="000b969f"/>
    </style:style>
    <style:style style:name="T17" style:family="text">
      <style:text-properties fo:font-variant="normal" fo:text-transform="none" style:font-name="Source Serif Pro" fo:font-size="10.8000001907349pt" fo:letter-spacing="normal" loext:padding="0cm" loext:border="none"/>
    </style:style>
    <style:style style:name="T18" style:family="text">
      <style:text-properties fo:font-variant="normal" fo:text-transform="none" style:font-name="Source Serif Pro" fo:font-size="8.39999961853027pt" fo:letter-spacing="normal" fo:font-style="normal" fo:font-weight="bold" loext:padding="0cm" loext:border="none"/>
    </style:style>
    <style:style style:name="T19" style:family="text">
      <style:text-properties fo:font-variant="normal" fo:text-transform="none" style:font-name="Source Serif Pro" fo:letter-spacing="normal" fo:font-style="normal" officeooo:rsid="000b969f"/>
    </style:style>
    <style:style style:name="T20" style:family="text">
      <style:text-properties fo:font-variant="normal" fo:text-transform="none" style:use-window-font-color="true" loext:opacity="0%" style:font-name="Source Serif Pro" fo:font-size="10.8000001907349pt" fo:letter-spacing="normal" fo:font-style="normal"/>
    </style:style>
    <style:style style:name="T21" style:family="text">
      <style:text-properties fo:font-variant="normal" fo:text-transform="none" style:use-window-font-color="true" loext:opacity="0%" style:font-name="Source Serif Pro" fo:font-size="10.8000001907349pt" fo:letter-spacing="normal" fo:font-style="normal" fo:font-weight="normal"/>
    </style:style>
    <style:style style:name="T22" style:family="text">
      <style:text-properties fo:font-variant="normal" fo:text-transform="none" style:use-window-font-color="true" loext:opacity="0%" style:font-name="Source Serif Pro" fo:font-size="10.8000001907349pt" fo:letter-spacing="normal" fo:font-style="normal" fo:font-weight="normal" loext:padding="0cm" loext:border="none"/>
    </style:style>
    <style:style style:name="T23" style:family="text">
      <style:text-properties fo:font-variant="normal" fo:text-transform="none" style:use-window-font-color="true" loext:opacity="0%" style:font-name="Source Serif Pro" fo:font-size="10.8000001907349pt" fo:letter-spacing="normal" fo:font-style="normal" fo:font-weight="normal" officeooo:rsid="000cd9dd"/>
    </style:style>
    <style:style style:name="T24" style:family="text">
      <style:text-properties fo:font-variant="normal" fo:text-transform="none" style:use-window-font-color="true" loext:opacity="0%" style:font-name="Source Serif Pro" fo:font-size="10.8000001907349pt" fo:letter-spacing="normal" fo:font-style="normal" fo:font-weight="normal" fo:background-color="#272822" loext:char-shading-value="0" loext:padding="0cm" loext:border="none"/>
    </style:style>
    <style:style style:name="T25" style:family="text">
      <style:text-properties fo:font-variant="normal" fo:text-transform="none" style:use-window-font-color="true" loext:opacity="0%" style:font-name="Source Serif Pro" fo:font-size="10.8000001907349pt" fo:letter-spacing="normal" fo:font-style="normal" fo:font-weight="normal" officeooo:rsid="000e7dbb"/>
    </style:style>
    <style:style style:name="T26" style:family="text">
      <style:text-properties fo:font-variant="normal" fo:text-transform="none" style:use-window-font-color="true" loext:opacity="0%" style:font-name="Source Serif Pro" fo:font-size="10.8000001907349pt" fo:letter-spacing="normal" fo:font-style="normal" fo:font-weight="bold" style:font-weight-asian="bold" style:font-weight-complex="bold"/>
    </style:style>
    <style:style style:name="T27" style:family="text">
      <style:text-properties fo:font-variant="normal" fo:text-transform="none" style:use-window-font-color="true" loext:opacity="0%" style:font-name="Source Serif Pro" fo:font-size="10.8000001907349pt" fo:letter-spacing="normal" fo:font-style="normal" fo:font-weight="bold" style:font-weight-asian="bold" style:font-weight-complex="bold" loext:padding="0cm" loext:border="none"/>
    </style:style>
    <style:style style:name="T28" style:family="text">
      <style:text-properties fo:font-variant="normal" fo:text-transform="none" style:use-window-font-color="true" loext:opacity="0%" style:font-name="Open sans" fo:letter-spacing="normal" fo:font-style="normal" fo:font-weight="normal"/>
    </style:style>
    <style:style style:name="T29" style:family="text">
      <style:text-properties fo:font-variant="normal" fo:text-transform="none" style:use-window-font-color="true" loext:opacity="0%" style:font-name="Open sans" fo:letter-spacing="normal" fo:font-style="normal" fo:font-weight="normal" loext:padding="0cm" loext:border="none"/>
    </style:style>
    <style:style style:name="T30" style:family="text">
      <style:text-properties fo:font-variant="normal" fo:text-transform="none" style:use-window-font-color="true" loext:opacity="0%" style:font-name="Open sans" fo:font-size="18pt" fo:letter-spacing="normal" fo:font-style="normal" fo:font-weight="normal" style:font-name-asian="NSimSun1" style:font-size-asian="18pt" style:font-name-complex="Lucida Sans1" style:font-size-complex="18pt" loext:padding="0cm" loext:border="none"/>
    </style:style>
    <style:style style:name="T31" style:family="text">
      <style:text-properties fo:font-variant="normal" fo:text-transform="none" style:use-window-font-color="true" loext:opacity="0%" style:font-name="Open sans" fo:font-size="10.8000001907349pt" fo:letter-spacing="normal" fo:font-style="normal" fo:font-weight="bold" loext:padding="0cm" loext:border="none"/>
    </style:style>
    <style:style style:name="T32" style:family="text">
      <style:text-properties fo:font-variant="normal" fo:text-transform="none" style:use-window-font-color="true" loext:opacity="0%" fo:font-size="10.8000001907349pt" fo:letter-spacing="normal" fo:font-style="normal" fo:font-weight="normal" fo:background-color="#272822" loext:char-shading-value="0" loext:padding="0cm" loext:border="none"/>
    </style:style>
    <style:style style:name="T33" style:family="text">
      <style:text-properties fo:font-variant="normal" fo:text-transform="none" fo:color="#dddddd" loext:opacity="100%" fo:font-size="10.8000001907349pt" fo:letter-spacing="normal" fo:font-style="normal" fo:font-weight="normal" fo:background-color="#272822" loext:char-shading-value="0" loext:padding="0cm" loext:border="none"/>
    </style:style>
    <style:style style:name="T34" style:family="text">
      <style:text-properties fo:font-variant="normal" fo:text-transform="none" fo:color="#dddddd" loext:opacity="100%" fo:letter-spacing="normal" fo:background-color="#272822" loext:char-shading-value="0" loext:padding="0cm" loext:border="none"/>
    </style:style>
    <style:style style:name="T35" style:family="text">
      <style:text-properties fo:font-variant="normal" fo:text-transform="none" fo:color="#a6e22e" loext:opacity="100%" fo:font-size="10.8000001907349pt" fo:letter-spacing="normal" fo:font-style="normal" fo:font-weight="normal" fo:background-color="#272822" loext:char-shading-value="0" loext:padding="0cm" loext:border="none"/>
    </style:style>
    <style:style style:name="T36" style:family="text">
      <style:text-properties fo:font-variant="normal" fo:text-transform="none" fo:color="#75715e" loext:opacity="100%" fo:font-size="10.8000001907349pt" fo:letter-spacing="normal" fo:font-style="normal" fo:font-weight="normal" fo:background-color="#272822" loext:char-shading-value="0" loext:padding="0cm" loext:border="none"/>
    </style:style>
    <style:style style:name="T37" style:family="text">
      <style:text-properties fo:font-variant="normal" fo:text-transform="none" fo:color="#d73a49" loext:opacity="100%" fo:font-size="10.8000001907349pt" fo:letter-spacing="normal" fo:font-style="normal" fo:font-weight="bold" fo:background-color="#272822" loext:char-shading-value="0" loext:padding="0cm" loext:border="none"/>
    </style:style>
    <style:style style:name="T38" style:family="text">
      <style:text-properties fo:font-variant="normal" fo:text-transform="none" fo:color="#f92672" loext:opacity="100%" fo:font-size="10.8000001907349pt" fo:letter-spacing="normal" fo:font-style="normal" fo:font-weight="normal" fo:background-color="#272822" loext:char-shading-value="0" loext:padding="0cm" loext:border="none"/>
    </style:style>
    <style:style style:name="T39" style:family="text">
      <style:text-properties fo:font-variant="normal" fo:text-transform="none" fo:color="#f92672" loext:opacity="100%" fo:font-size="10.8000001907349pt" fo:letter-spacing="normal" fo:font-style="normal" fo:font-weight="bold" fo:background-color="#272822" loext:char-shading-value="0" loext:padding="0cm" loext:border="none"/>
    </style:style>
    <style:style style:name="T40" style:family="text">
      <style:text-properties fo:font-variant="normal" fo:text-transform="none" fo:color="#005cc5" loext:opacity="100%" fo:font-size="10.8000001907349pt" fo:letter-spacing="normal" fo:font-style="normal" fo:font-weight="normal" fo:background-color="#272822" loext:char-shading-value="0" loext:padding="0cm" loext:border="none"/>
    </style:style>
    <style:style style:name="T41" style:family="text">
      <style:text-properties fo:font-variant="normal" fo:text-transform="none" fo:color="#bf79db" loext:opacity="100%" fo:font-size="10.8000001907349pt" fo:letter-spacing="normal" fo:font-style="normal" fo:font-weight="normal" fo:background-color="#272822" loext:char-shading-value="0" loext:padding="0cm" loext:border="none"/>
    </style:style>
    <style:style style:name="T42" style:family="text">
      <style:text-properties fo:font-variant="normal" fo:text-transform="none" fo:color="#ffffff" loext:opacity="100%" style:font-name="Source Serif Pro" fo:font-size="10.8000001907349pt" fo:letter-spacing="normal" fo:font-style="normal"/>
    </style:style>
    <style:style style:name="T43" style:family="text">
      <style:text-properties fo:font-variant="normal" fo:text-transform="none" fo:color="#ffffff" loext:opacity="100%" style:font-name="Source Serif Pro" fo:font-size="10.8000001907349pt" fo:letter-spacing="normal" fo:font-style="normal" fo:font-weight="normal"/>
    </style:style>
    <style:style style:name="T44" style:family="text">
      <style:text-properties fo:font-variant="normal" fo:text-transform="none" fo:color="#ffffff" loext:opacity="100%" style:font-name="Source Serif Pro" fo:font-size="10.8000001907349pt" fo:letter-spacing="normal" fo:font-style="normal" fo:font-weight="normal" fo:background-color="#272822" loext:char-shading-value="0" loext:padding="0cm" loext:border="none"/>
    </style:style>
    <style:style style:name="T45" style:family="text">
      <style:text-properties fo:font-variant="normal" fo:text-transform="none" fo:color="#ffffff" loext:opacity="100%" fo:font-size="10.8000001907349pt" fo:letter-spacing="normal" fo:font-style="normal" fo:font-weight="normal" fo:background-color="#272822" loext:char-shading-value="0" loext:padding="0cm" loext:border="none"/>
    </style:style>
    <style:style style:name="T46" style:family="text">
      <style:text-properties fo:font-variant="normal" fo:text-transform="none" style:font-name="Open sans" fo:letter-spacing="normal" fo:font-style="normal"/>
    </style:style>
    <style:style style:name="T47" style:family="text">
      <style:text-properties fo:font-variant="normal" fo:text-transform="none" fo:font-size="10.8000001907349pt" fo:letter-spacing="normal" fo:font-style="normal" fo:font-weight="normal" fo:background-color="#272822" loext:char-shading-value="0" loext:padding="0cm" loext:border="none"/>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color="#ffffff" loext:opacity="100%"/>
    </style:style>
    <style:style style:name="T51" style:family="text">
      <style:text-properties fo:color="#ffffff" loext:opacity="100%" style:font-name="Source Serif Pro" fo:font-size="10.8000001907349pt" fo:letter-spacing="normal" loext:padding="0cm" loext:border="none"/>
    </style:style>
    <style:style style:name="T52" style:family="text">
      <style:text-properties fo:color="#dddddd" loext:opacity="100%" fo:font-weight="normal" fo:background-color="#272822" loext:char-shading-value="0" loext:padding="0cm" loext:border="none"/>
    </style:style>
    <style:style style:name="T53" style:family="text">
      <style:text-properties fo:color="#dddddd" loext:opacity="100%" fo:background-color="#272822" loext:char-shading-value="0" loext:padding="0cm" loext:border="none"/>
    </style:style>
    <style:style style:name="T54" style:family="text">
      <style:text-properties fo:color="#75715e" loext:opacity="100%" fo:background-color="#272822" loext:char-shading-value="0"/>
    </style:style>
    <style:style style:name="T55" style:family="text">
      <style:text-properties fo:color="#a6e22e" loext:opacity="100%" fo:font-weight="normal" fo:background-color="#272822" loext:char-shading-value="0" loext:padding="0cm" loext:border="none"/>
    </style:style>
    <style:style style:name="T56" style:family="text">
      <style:text-properties fo:color="#a6e22e" loext:opacity="100%" fo:background-color="#272822" loext:char-shading-value="0" loext:padding="0cm" loext:border="none"/>
    </style:style>
    <style:style style:name="T57" style:family="text">
      <style:text-properties fo:color="#87172f" loext:opacity="100%"/>
    </style:style>
    <style:style style:name="T58" style:family="text">
      <style:text-properties fo:color="#ca4948" loext:opacity="100%"/>
    </style:style>
    <style:style style:name="T59" style:family="text">
      <style:text-properties fo:color="#ca4948" loext:opacity="100%" fo:font-size="12pt" style:font-size-asian="12pt" style:font-size-complex="12pt"/>
    </style:style>
    <style:style style:name="T60"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1. Entendendo o projeto e configurando o ambiente</text:p>
      <text:p text:style-name="P12"><text:span text:style-name="T7">Se estamos na jornada de aprendizado para nos tornarmos pessoas desenvolvedoras </text:span><text:span text:style-name="Emphasis"><text:span text:style-name="T8">front-end</text:span></text:span><text:span text:style-name="T7">, este curso certamente agregará muito ao nosso conhecimento. Vamos aprender bastante sobre responsividade.</text:span></text:p>
      <text:h text:style-name="P4" text:outline-level="2">Criando um site responsivo</text:h>
      <text:p text:style-name="P6">Primeiramente, vamos criar um <text:span text:style-name="T49">site completo, </text:span>utilizando técnicas de <text:span text:style-name="T49">responsividade</text:span> para que funcione perfeitamente em celulares, tablets e computadores, independentemente do tamanho da tela. Aprenderemos a <text:span text:style-name="T49">estruturar um projeto do zero</text:span>, considerando como esses elementos evoluirão. Também abordaremos a <text:span text:style-name="T49">gestão dos arquivos</text:span> à medida que escrevemos o código.</text:p>
      <text:p text:style-name="P6">Vamos aprender a <text:span text:style-name="T49">usar variáveis no CSS</text:span>, criando uma espécie de central de controle onde todas as informações e estilos do tema ficam concentrados. Isso permitirá que tenhamos apenas um local de modificação quando necessário.</text:p>
      <text:h text:style-name="P4" text:outline-level="2">Explorando o conceito de Mobile First</text:h>
      <text:p text:style-name="P5"/>
      <text:p text:style-name="P11"><text:span text:style-name="T21">Discutiremos também o conceito de </text:span><text:span text:style-name="Emphasis"><text:span text:style-name="T27">Mobile First </text:span></text:span><text:span text:style-name="T21">(primeiro o móvel), que significa começar pelo que é mais importante: a menor tela. Desenvolveremos inicialmente para celulares, já que representam o maior percentual de acessos à web atualmente, e depois aprimoraremos para telas maiores.</text:span></text:p>
      <text:p text:style-name="P6">Conforme o espaço na tela aumenta, incrementamos até chegar em um desktop. Vamos discutir também <text:span text:style-name="T49">como controlar os estilos</text:span> de acordo com esses dispositivos. Assim, conseguimos identificar o tamanho do dispositivo e aplicar um estilo apropriado para ele.</text:p>
      <text:h text:style-name="P4" text:outline-level="2">Adotando uma abordagem componentizada</text:h>
      <text:p text:style-name="P6">Vamos adotar uma <text:span text:style-name="T49">abordagem componentizada</text:span> para que possamos<text:span text:style-name="T49"> reaproveitar código e</text:span> evitar duplicações desnecessárias, reduzindo a repetição na escrita de código. Trabalharemos bastante com la<text:span text:style-name="T49">youts flexíveis</text:span>, utilizando <text:span text:style-name="T49">CSS Flexbox e CSS Grid.</text:span></text:p>
      <text:p text:style-name="P6">Enquanto aprendemos tudo isso, desenvolveremos o site da agência de viagens "Jornada Viagens". Trata-se de um site completo, que inclui várias seções, como um banner estético de fundo, um menu com diversas opções, uma seção de ofertas da semana com cards promocionais, uma seção de busca por categoria, destinos populares e condições de pagamento. É um site profissional e completo que funcionará em todos os dispositivos.</text:p>
      <text:h text:style-name="P4" text:outline-level="2">Garantindo a adaptação em diferentes dispositivos</text:h>
      <text:p text:style-name="P6">Se acessarmos de um dispositivo móvel, ele se comportará de forma adequada, com um menu que abre e fecha. Em um tablet, tudo ficará tranquilo, e no desktop, tanto nos menores quanto nos maiores, tudo se adaptará perfeitamente.</text:p>
      <text:p text:style-name="P6">Há muito para aprender, com conceitos importantes, e estamos animados para começar. É importante que já tenhamos um conhecimento prévio intermediário de HTML e CSS para aproveitar bem o conteúdo.</text:p>
      <text:p text:style-name="P6"/>
      <text:p text:style-name="P6"/>
      <text:p text:style-name="P6"><text:soft-page-break/>Neste curso iremos utilizar o Figma para construir o nosso projeto.</text:p>
      <text:p text:style-name="P15"><text:span text:style-name="T21">O </text:span><text:span text:style-name="Strong_20_Emphasis"><text:span text:style-name="T22">Figma </text:span></text:span><text:span text:style-name="T21">é uma ferramenta de design colaborativa baseada na nuvem. Vamos aprender a como ter acesso?</text:span></text:p>
      <text:h text:style-name="P8" text:outline-level="2"><text:span text:style-name="Strong_20_Emphasis"><text:span text:style-name="T29">1. Acesse o site do Figma</text:span></text:span></text:h>
      <text:list text:style-name="L1">
        <text:list-item>
          <text:p text:style-name="P41"><text:span text:style-name="T21">Abra seu navegador e acesse o site oficial do Figma:</text:span><text:span text:style-name="T23">h</text:span><text:a xlink:type="simple" xlink:href="https://www.figma.com/pt-br/" office:target-frame-name="_blank" xlink:show="new" text:style-name="Internet_20_link" text:visited-style-name="Visited_20_Internet_20_Link"><text:span text:style-name="Strong_20_Emphasis"><text:span text:style-name="T22">ttps://www.figma.com/pt-br/</text:span></text:span></text:a><text:span text:style-name="T21">.</text:span></text:p>
        </text:list-item>
      </text:list>
      <text:h text:style-name="P8" text:outline-level="2"><text:span text:style-name="Strong_20_Emphasis"><text:span text:style-name="T29">2. Criar uma conta no Figma</text:span></text:span></text:h>
      <text:list text:style-name="L2">
        <text:list-item>
          <text:p text:style-name="P42"><text:span text:style-name="T21">Clique e </text:span><text:span text:style-name="Strong_20_Emphasis"><text:span text:style-name="T22">"Comece grátis”</text:span></text:span><text:span text:style-name="T21">:</text:span></text:p>
        </text:list-item>
      </text:list>
      <text:h text:style-name="P9" text:outline-level="2"><text:span text:style-name="Strong_20_Emphasis"><text:span text:style-name="T30">3. Confirme seu e-mail</text:span></text:span></text:h>
      <text:list text:style-name="L3">
        <text:list-item>
          <text:p text:style-name="P43">Verifique sua caixa de entrada e procure o e-mail de confirmação enviado pelo Figma.</text:p>
        </text:list-item>
        <text:list-item>
          <text:p text:style-name="P43">Clique no link fornecido para validar sua conta.</text:p>
        </text:list-item>
        <text:list-item>
          <text:p text:style-name="P55"><text:span text:style-name="T21">Após criar sua conta e confirmar o e-mail, abra o link do Figma fornecido na aula:<text:line-break/></text:span><text:a xlink:type="simple" xlink:href="https://www.figma.com/file/TXnjaPMfJW0AriRTtxmEYG/Jornada-Viagens---Acervo-%28Faça-uma-cópia%29?type=design&amp;node-id=0%3A1&amp;mode=design&amp;t=gK8aBsHgE59mQyy0-1" office:target-frame-name="_blank" xlink:show="new" text:style-name="Internet_20_link" text:visited-style-name="Visited_20_Internet_20_Link"><text:span text:style-name="Strong_20_Emphasis">Acesse o projeto da aula aqui</text:span></text:a><text:span text:style-name="Strong_20_Emphasis"><text:span text:style-name="T22"> </text:span></text:span></text:p>
        </text:list-item>
      </text:list>
      <text:h text:style-name="P10" text:outline-level="2"><text:span text:style-name="Strong_20_Emphasis"><text:span text:style-name="T29">4. Primeiros passos no Figma</text:span></text:span></text:h>
      <text:list text:style-name="L4">
        <text:list-item>
          <text:p text:style-name="P44">Após acessar o link, você verá o projeto compartilhado pela aula.</text:p>
        </text:list-item>
        <text:list-item>
          <text:p text:style-name="P56"><text:span text:style-name="T21">Clique em </text:span><text:span text:style-name="Strong_20_Emphasis"><text:span text:style-name="T22">"</text:span></text:span><text:span text:style-name="Strong_20_Emphasis"><text:span text:style-name="T27">Duplicate</text:span></text:span><text:span text:style-name="Strong_20_Emphasis"><text:span text:style-name="T22">" </text:span></text:span><text:span text:style-name="T21">(Duplicar) para salvar uma cópia em sua conta, caso deseje editá-lo de forma independente:</text:span></text:p>
        </text:list-item>
      </text:list>
      <text:h text:style-name="P7" text:outline-level="2">Projeto do curso</text:h>
      <text:p text:style-name="P11"><text:span text:style-name="T21">Caso você queira conferir os códigos do projeto que iremos construir ao longo do curso, você pode acessar o </text:span><text:a xlink:type="simple" xlink:href="https://github.com/alura-cursos/jornada-viagens" office:target-frame-name="_blank" xlink:show="new" text:style-name="Internet_20_link" text:visited-style-name="Visited_20_Internet_20_Link">repositório no GitHub</text:a><text:span text:style-name="T22"> </text:span><text:span text:style-name="T21">e fazer uma cópia pra sua conta.</text:span></text:p>
      <text:h text:style-name="P1" text:outline-level="1"><text:span text:style-name="T4">03</text:span><text:span text:style-name="T2">Apresentando o projeto Jornada Viagens</text:span></text:h>
      <text:p text:style-name="P13"/>
      <text:h text:style-name="P2" text:outline-level="1"><text:span text:style-name="T4">03</text:span><text:span text:style-name="T2">Apresentando o projeto Jornada Viagens</text:span></text:h>
      <text:p text:style-name="P14"/>
      <text:p text:style-name="P6">A proposta é discutirmos o projeto que desenvolveremos ao longo do curso e entendermos os temas nos quais nos aprofundaremos para alcançar esse resultado.</text:p>
      <text:p text:style-name="P6">Nosso objetivo é<text:span text:style-name="T49"> construir o site</text:span> de uma agência de viagens chamada Jornada Viagens, garantindo que ele seja <text:span text:style-name="T49">100% responsivo</text:span>. O tema central deste curso será a responsividade. Mas o que é responsividade? É quando nossos <text:span text:style-name="T49">sites se adaptam</text:span> a <text:span text:style-name="T49">qualquer tamanho de tela</text:span> do usuário. Não importa se está em um celular menor ou maior, na vertical ou horizontal, tablet ou desktop; o site será apresentado de forma esteticamente adequada para cada tipo de dispositivo.</text:p>
      <text:h text:style-name="P4" text:outline-level="2">Explorando tecnologias e boas práticas</text:h>
      <text:p text:style-name="P6">Para alcançarmos esse resultado, precisaremos nos aprofundar em <text:span text:style-name="T49">CSS</text:span>, conhecer novos seletores e recursos. Também exploraremos mais o <text:span text:style-name="T49">HTML5</text:span>, além das boas práticas de <text:span text:style-name="T49">semântica, SEO e acessibilidade,</text:span> abordaremos estratégias de construção de layout. Conheceremos algumas outras <text:span text:style-name="T49">tags auxiliares</text:span> para estruturar o HTML e, em seguida, utilizaremos o <text:span text:style-name="T49">CSS3</text:span> com esses <text:span text:style-name="T49">novos recursos </text:span>para atingir o resultado final.</text:p>
      <text:h text:style-name="P4" text:outline-level="2"><text:soft-page-break/>Descrevendo a versão desktop do site</text:h>
      <text:p text:style-name="P6">Na versão desktop, temos um menu superior com fundo preto, um logo à esquerda e três links à direita: blog, pacotes de viagem e contato. Logo abaixo, há uma imagem de uma pessoa em um barco, entre árvores, em um rio muito azul, com árvores ao redor. Abaixo, há uma descrição sobre a agência, destacando que somos uma agência apaixonada por criar viagens inesquecíveis e mencionando a missão da agência.</text:p>
      <text:p text:style-name="P11"><text:span text:style-name="T21">Em seguida, temos um bloco sobre as ofertas da semana, com duas linhas e duas colunas, totalizando quatro </text:span><text:span text:style-name="Emphasis"><text:span text:style-name="T22">cards </text:span></text:span><text:span text:style-name="T21">de informação. Cada </text:span><text:span text:style-name="Emphasis"><text:span text:style-name="T22">card </text:span></text:span><text:span text:style-name="T21">contém o pacote, hotel mais aéreo, destino, valor e um botão de ver detalhes, totalizando quatro ofertas.</text:span></text:p>
      <text:h text:style-name="P4" text:outline-level="2">Apresentando seções adicionais do site</text:h>
      <text:p text:style-name="P6">Na sequência, há uma seção de categorias, com quatro categorias, onde temos ícones e descrições: pacotes nacionais, pacotes internacionais, transferes, seguro e viagem.</text:p>
      <text:p text:style-name="P6">Logo após a sessão inicial, temos a seção de destinos populares, onde apresentamos dois destinos lado a lado. Cada destino é composto por uma imagem, como a de Tóquio e a de Osaka. A imagem de Tóquio é mais escura, mostrando uma cidade à noite com várias luzes acesas, enquanto a imagem de Osaka destaca as flores de cerejeira já floridas. Abaixo das imagens, temos o título, a descrição e o botão "ver detalhes". A ideia é que, ao clicarmos em "ver detalhes", sejamos direcionados para a página do destino.</text:p>
      <text:h text:style-name="P4" text:outline-level="2">Detalhando condições de pagamento e depoimentos</text:h>
      <text:p text:style-name="P6">Em seguida, temos a seção de condições de pagamento, que inclui imagens de mala de viagem e passaporte. À esquerda, há uma descrição, e à direita, as imagens. A seção de depoimentos apresenta o depoimento em si, a imagem da pessoa usuária, seu nome e a quantidade de estrelas atribuídas ao depoimento de qualidade. Ao final, há uma imagem de uma cidade bonita que antecede o rodapé. O rodapé é preto e contém o logotipo do jornal de viagens, informações de atendimento, redes sociais e créditos de desenvolvimento.</text:p>
      <text:h text:style-name="P4" text:outline-level="2">Adaptando o site para tablet e dispositivos móveis</text:h>
      <text:p text:style-name="P6">Essa é a versão para desktop. Também temos a versão para tablet, onde a principal mudança está no menu superior. Ele não é mais um menu contínuo, mas sim um ícone mais conciso, apenas com a bússola, e um menu de três linhas, conhecido como menu hambúrguer. A partir daí, o comportamento muda. A imagem também tem outras dimensões, com a segunda imagem mais alta. A descrição permanece a mesma, e as ofertas da semana estão distribuídas do mesmo modo. As categorias mudaram um pouco na distribuição: antes eram quatro em uma linha, agora são duas por linha. Destinos populares, que antes estavam lado a lado, agora estão um acima do outro. As condições de pagamento também mudaram: a descrição, que ficava à esquerda, agora está na parte superior. Os depoimentos, que estavam lado a lado em uma linha, agora estão um sobre o outro. A imagem que antecede o rodapé também foi reduzida.</text:p>
      <text:p text:style-name="P6">Além disso, temos a versão para dispositivos móveis, que segue quase o mesmo princípio do tablet. A diferença é que não teremos mais duas colunas em algumas áreas, como a área de ofertas da semana, que antes tinha duas colunas com duas linhas. Agora, é tudo em uma única coluna, com uma informação abaixo da outra. Esse é o tipo de técnica que aplicaremos na construção do projeto, ou seja, o objetivo é ocupar da melhor forma possível o espaço disponível para a pessoa usuária, mostrando apenas as informações mais importantes e ordenando-as com mais intenção.</text:p>
      <text:h text:style-name="P4" text:outline-level="2"><text:soft-page-break/>Concluindo a introdução do projeto</text:h>
      <text:p text:style-name="P11"><text:span text:style-name="T21">Por ora, esse é o projeto que vamos construir. Esperamos vocês no próximo vídeo, onde começaremos a preparar o </text:span><text:span text:style-name="Emphasis"><text:span text:style-name="T22">setup</text:span></text:span><text:span text:style-name="T21">, organizar nossa estrutura e criar nosso repositório para, em seguida, colocarmos a mão na massa. Nos vemos no próximo vídeo.</text:span></text:p>
      <text:p text:style-name="P11"/>
      <text:h text:style-name="P16" text:outline-level="1"><text:span text:style-name="T18">04</text:span><text:span text:style-name="T11">Primeiras configurações</text:span></text:h>
      <text:p text:style-name="P3"/>
      <text:p text:style-name="P14"><text:span text:style-name="T10">V</text:span><text:span text:style-name="T7">amos organizar o projeto para que possamos focar apenas na codificação posteriormente. Agora, adotaremos um processo diferente. Anteriormente, criávamos um projeto em nosso computador, adicionávamos o </text:span><text:span text:style-name="Emphasis"><text:span text:style-name="T8">git </text:span></text:span><text:span text:style-name="T7">com </text:span><text:span text:style-name="Source_20_Text"><text:span text:style-name="T9">git init</text:span></text:span><text:span text:style-name="T7">, criávamos um repositório no GitHub e fazíamos a conexão entre os dois, finalizando com o </text:span><text:span text:style-name="Emphasis"><text:span text:style-name="T8">push</text:span></text:span><text:span text:style-name="T7">. Desta vez, faremos de forma diferente, utilizando um método mais fácil para iniciar um projeto.</text:span><text:span text:style-name="T7"/></text:p>
      <text:p text:style-name="P11"><text:span text:style-name="T21">Primeiramente, acessamos nosso </text:span><text:span text:style-name="T26">GitHub</text:span><text:span text:style-name="T21"> e clicamos no botão para </text:span><text:span text:style-name="T26">criar um novo repositório. </text:span><text:span text:style-name="T21">Vamos criar um repositório chamado "Jornada Viagens" e adicionar uma breve descrição: "Site da agência, site Jornada Viagens, desenvolvido durante o curso de responsividade da formação </text:span><text:span text:style-name="Emphasis"><text:span text:style-name="T22">front-end </text:span></text:span><text:span text:style-name="T21">Alura." Não alteraremos as configurações, mantendo o repositório como público, e clicaremos no botão "Create Repository".</text:span><text:span text:style-name="T7"/></text:p>
      <text:h text:style-name="P4" text:outline-level="2">Clonando o repositório e configurando a estrutura inicial<text:span text:style-name="T7"/></text:h>
      <text:p text:style-name="P11"><text:span text:style-name="T26">Após criar o repositório,</text:span><text:span text:style-name="T21"> algumas opções serão apresentadas. Anteriormente, utilizávamos a opção de fazer </text:span><text:span text:style-name="Emphasis"><text:span text:style-name="T22">push </text:span></text:span><text:span text:style-name="T21">de um repositório já existente, mas hoje faremos diferente. No "</text:span><text:span text:style-name="T26">Quick Setup</text:span><text:span text:style-name="T21">", selecionamos a opção </text:span><text:span text:style-name="T26">HTTPS</text:span><text:span text:style-name="T21"> e </text:span><text:span text:style-name="T26">copiamos a URL</text:span><text:span text:style-name="T21"> gerada. No </text:span><text:span text:style-name="T26">terminal</text:span><text:span text:style-name="T21">, já estamos dentro de uma pasta criada chamada "Curso Responsividade". </text:span><text:span text:style-name="T26">Dentro dessa pasta</text:span><text:span text:style-name="T21">, ou onde quer que o projeto "Jornada Viagens" seja armazenado, digitamos o comando </text:span><text:span text:style-name="Source_20_Text"><text:span text:style-name="T24">git clone </text:span></text:span><text:span text:style-name="T21">seguido da URL copiada do GitHub.</text:span><text:span text:style-name="T7"/></text:p>
      <text:p text:style-name="P26"><text:span text:style-name="Source_20_Text"><text:span text:style-name="T33">git </text:span></text:span><text:span text:style-name="Source_20_Text"><text:span text:style-name="T35">clone</text:span></text:span><text:span text:style-name="Source_20_Text"><text:span text:style-name="T33"> https://github.com/DaniCastilho/jornada-viagens.git</text:span></text:span><text:span text:style-name="T7"/></text:p>
      <text:p text:style-name="P11"><text:span text:style-name="Source_20_Text"/></text:p>
      <text:p text:style-name="P11"><text:span text:style-name="T21">O comando </text:span><text:span text:style-name="Source_20_Text"><text:span text:style-name="T24">git clone </text:span></text:span><text:span text:style-name="T21">clonará o repositório já criado em nossa máquina, criando automaticamente uma pasta "Jornada Viagens" com o </text:span><text:span text:style-name="Emphasis"><text:span text:style-name="T22">git </text:span></text:span><text:span text:style-name="T21">já iniciado. Ao executar o comando, recebemos um aviso de que aparentemente clonamos um repositório vazio. Isso é esperado, pois vamos preenchê-lo agora. A pasta "Jornada Viagens" já está criada.</text:span><text:span text:style-name="T7"/></text:p>
      <text:h text:style-name="P4" text:outline-level="2">Criando arquivos e pastas essenciais<text:span text:style-name="T7"/></text:h>
      <text:p text:style-name="P11"><text:span text:style-name="T21">Dentro da pasta "Jornada Viagens", sabemos o que criar. Vamos criar o arquivo </text:span><text:span text:style-name="Source_20_Text"><text:span text:style-name="T24">index.html </text:span></text:span><text:span text:style-name="T21">e, dentro dele, utilizaremos um atalho para criar a estrutura básica do HTML.</text:span><text:span text:style-name="T7"/></text:p>
      <text:p text:style-name="P27"><text:span text:style-name="Source_20_Text"><text:span text:style-name="T36">&lt;!DOCTYPE </text:span></text:span><text:span text:style-name="Source_20_Text"><text:span text:style-name="T37">html</text:span></text:span><text:span text:style-name="Source_20_Text"><text:span text:style-name="T36">&gt;</text:span></text:span><text:span text:style-name="T7"/></text:p>
      <text:p text:style-name="P30"><text:span text:style-name="Source_20_Text"><text:span text:style-name="T38">&lt;html </text:span></text:span><text:span text:style-name="Source_20_Text"><text:span text:style-name="T40">lang</text:span></text:span><text:span text:style-name="Source_20_Text"><text:span text:style-name="T38">=</text:span></text:span><text:span text:style-name="Source_20_Text"><text:span text:style-name="T35">"en"</text:span></text:span><text:span text:style-name="Source_20_Text"><text:span text:style-name="T38">&gt;</text:span></text:span><text:span text:style-name="T7"/></text:p>
      <text:p text:style-name="P30"><text:span text:style-name="Source_20_Text"><text:span text:style-name="T38">&lt;head&gt;</text:span></text:span><text:span text:style-name="T7"/></text:p>
      <text:p text:style-name="P30"><text:span text:style-name="Source_20_Text"><text:span text:style-name="T34"><text:s text:c="4"/></text:span></text:span><text:span text:style-name="Source_20_Text"><text:span text:style-name="T38">&lt;meta </text:span></text:span><text:span text:style-name="Source_20_Text"><text:span text:style-name="T40">charset</text:span></text:span><text:span text:style-name="Source_20_Text"><text:span text:style-name="T38">=</text:span></text:span><text:span text:style-name="Source_20_Text"><text:span text:style-name="T35">"UTF-8"</text:span></text:span><text:span text:style-name="Source_20_Text"><text:span text:style-name="T38">&gt;</text:span></text:span><text:span text:style-name="T7"/></text:p>
      <text:p text:style-name="P30"><text:span text:style-name="Source_20_Text"><text:span text:style-name="T34"><text:s text:c="4"/></text:span></text:span><text:span text:style-name="Source_20_Text"><text:span text:style-name="T38">&lt;meta </text:span></text:span><text:span text:style-name="Source_20_Text"><text:span text:style-name="T40">name</text:span></text:span><text:span text:style-name="Source_20_Text"><text:span text:style-name="T38">=</text:span></text:span><text:span text:style-name="Source_20_Text"><text:span text:style-name="T35">"viewport"</text:span></text:span><text:span text:style-name="Source_20_Text"><text:span text:style-name="T38"> </text:span></text:span><text:span text:style-name="Source_20_Text"><text:span text:style-name="T40">content</text:span></text:span><text:span text:style-name="Source_20_Text"><text:span text:style-name="T38">=</text:span></text:span><text:span text:style-name="Source_20_Text"><text:span text:style-name="T35">"width=device-width, initial-scale=1.0"</text:span></text:span><text:span text:style-name="Source_20_Text"><text:span text:style-name="T38">&gt;</text:span></text:span><text:span text:style-name="T7"/></text:p>
      <text:p text:style-name="P30"><text:span text:style-name="Source_20_Text"><text:span text:style-name="T34"><text:s text:c="4"/></text:span></text:span><text:span text:style-name="Source_20_Text"><text:span text:style-name="T38">&lt;title&gt;</text:span></text:span><text:span text:style-name="Source_20_Text"><text:span text:style-name="T33">Document</text:span></text:span><text:span text:style-name="Source_20_Text"><text:span text:style-name="T38">&lt;/title&gt;</text:span></text:span><text:span text:style-name="T7"/></text:p>
      <text:p text:style-name="P30"><text:span text:style-name="Source_20_Text"><text:span text:style-name="T38">&lt;/head&gt;</text:span></text:span><text:span text:style-name="T7"/></text:p>
      <text:p text:style-name="P30"><text:span text:style-name="Source_20_Text"><text:span text:style-name="T38">&lt;body&gt;</text:span></text:span><text:span text:style-name="T7"/></text:p>
      <text:p text:style-name="P31"><text:span text:style-name="Source_20_Text"><text:span text:style-name="T34"><text:s text:c="4"/></text:span></text:span><text:span text:style-name="T7"/></text:p>
      <text:p text:style-name="P30"><text:span text:style-name="Source_20_Text"><text:span text:style-name="T38">&lt;/body&gt;</text:span></text:span><text:span text:style-name="T7"/></text:p>
      <text:p text:style-name="P30"><text:span text:style-name="Source_20_Text"><text:span text:style-name="T38">&lt;/html&gt;</text:span></text:span><text:span text:style-name="T7"/></text:p>
      <text:p text:style-name="P58"><text:span text:style-name="Source_20_Text"/></text:p>
      <text:p text:style-name="P58"><text:span text:style-name="T21">Agora, alteramos o título para "Jornada Viagens".</text:span><text:span text:style-name="T7"/></text:p>
      <text:p text:style-name="P26"><text:span text:style-name="Source_20_Text"><text:span text:style-name="T38">&lt;title&gt;</text:span></text:span><text:span text:style-name="Source_20_Text"><text:span text:style-name="T33">Jornada Viagens</text:span></text:span><text:span text:style-name="Source_20_Text"><text:span text:style-name="T38">&lt;/title&gt;</text:span></text:span><text:span text:style-name="T7"/></text:p>
      <text:p text:style-name="P11"><text:span text:style-name="Source_20_Text"/></text:p>
      <text:p text:style-name="P11"><text:soft-page-break/><text:span text:style-name="T21">Após isso, salvamos a estrutura. Também precisaremos de uma pasta chamada "css" e outra chamada "img". Certificamo-nos de que a pasta "img" esteja fora da pasta "css". Assim, dentro de "Jornada Viagens", teremos as pastas "css", "img" e o arquivo </text:span><text:span text:style-name="Source_20_Text"><text:span text:style-name="T24">index.html</text:span></text:span><text:span text:style-name="T21">. Dentro da pasta "css", criaremos o arquivo </text:span><text:span text:style-name="Source_20_Text"><text:span text:style-name="T24">style.css</text:span></text:span><text:span text:style-name="T21">.</text:span><text:span text:style-name="T7"/></text:p>
      <text:h text:style-name="P4" text:outline-level="2">Adicionando CSS reset e realizando o primeiro commit<text:span text:style-name="T7"/></text:h>
      <text:p text:style-name="P11"><text:span text:style-name="T21">Aqui, podemos também incluir um </text:span><text:span text:style-name="Emphasis"><text:span text:style-name="T22">reset </text:span></text:span><text:span text:style-name="T21">simples, que é o mesmo CSS que utilizamos no desenvolvimento do formulário. Trata-se de um CSS </text:span><text:span text:style-name="Emphasis"><text:span text:style-name="T22">reset </text:span></text:span><text:span text:style-name="T21">que faz o ajuste básico nesses elementos.</text:span><text:span text:style-name="T7"/></text:p>
      <text:p text:style-name="P26"><text:span text:style-name="Source_20_Text"><text:span text:style-name="T36">/* CSS RESET */</text:span></text:span><text:span text:style-name="T7"/></text:p>
      <text:p text:style-name="P30"><text:span text:style-name="Source_20_Text"><text:span text:style-name="T39">body</text:span></text:span><text:span text:style-name="Source_20_Text"><text:span text:style-name="T33">, </text:span></text:span><text:span text:style-name="Source_20_Text"><text:span text:style-name="T39">img</text:span></text:span><text:span text:style-name="Source_20_Text"><text:span text:style-name="T33">, </text:span></text:span><text:span text:style-name="Source_20_Text"><text:span text:style-name="T39">h1</text:span></text:span><text:span text:style-name="Source_20_Text"><text:span text:style-name="T33">, </text:span></text:span><text:span text:style-name="Source_20_Text"><text:span text:style-name="T39">p</text:span></text:span><text:span text:style-name="Source_20_Text"><text:span text:style-name="T33">, </text:span></text:span><text:span text:style-name="Source_20_Text"><text:span text:style-name="T39">fieldset</text:span></text:span><text:span text:style-name="Source_20_Text"><text:span text:style-name="T33">, </text:span></text:span><text:span text:style-name="Source_20_Text"><text:span text:style-name="T39">legend</text:span></text:span><text:span text:style-name="Source_20_Text"><text:span text:style-name="T33">, </text:span></text:span><text:span text:style-name="Source_20_Text"><text:span text:style-name="T39">label</text:span></text:span><text:span text:style-name="Source_20_Text"><text:span text:style-name="T33">, </text:span></text:span><text:span text:style-name="Source_20_Text"><text:span text:style-name="T39">input</text:span></text:span><text:span text:style-name="Source_20_Text"><text:span text:style-name="T33">, select, </text:span></text:span><text:span text:style-name="Source_20_Text"><text:span text:style-name="T39">textarea</text:span></text:span><text:span text:style-name="Source_20_Text"><text:span text:style-name="T33">, </text:span></text:span><text:span text:style-name="Source_20_Text"><text:span text:style-name="T39">button</text:span></text:span><text:span text:style-name="Source_20_Text"><text:span text:style-name="T33"> {</text:span></text:span><text:span text:style-name="T7"/></text:p>
      <text:p text:style-name="P30"><text:span text:style-name="Source_20_Text"><text:span text:style-name="T34"><text:s text:c="4"/></text:span></text:span><text:span text:style-name="Source_20_Text"><text:span text:style-name="T41">margin</text:span></text:span><text:span text:style-name="Source_20_Text"><text:span text:style-name="T33">: </text:span></text:span><text:span text:style-name="Source_20_Text"><text:span text:style-name="T40">0</text:span></text:span><text:span text:style-name="Source_20_Text"><text:span text:style-name="T33">;</text:span></text:span><text:span text:style-name="T7"/></text:p>
      <text:p text:style-name="P30"><text:span text:style-name="Source_20_Text"><text:span text:style-name="T34"><text:s text:c="4"/></text:span></text:span><text:span text:style-name="Source_20_Text"><text:span text:style-name="T41">padding</text:span></text:span><text:span text:style-name="Source_20_Text"><text:span text:style-name="T33">: </text:span></text:span><text:span text:style-name="Source_20_Text"><text:span text:style-name="T40">0</text:span></text:span><text:span text:style-name="Source_20_Text"><text:span text:style-name="T33">;</text:span></text:span><text:span text:style-name="T7"/></text:p>
      <text:p text:style-name="P30"><text:span text:style-name="Source_20_Text"><text:span text:style-name="T34"><text:s text:c="4"/></text:span></text:span><text:span text:style-name="Source_20_Text"><text:span text:style-name="T41">box-sizing</text:span></text:span><text:span text:style-name="Source_20_Text"><text:span text:style-name="T33">: border-box;</text:span></text:span><text:span text:style-name="T7"/></text:p>
      <text:p text:style-name="P31"><text:span text:style-name="Source_20_Text"><text:span text:style-name="T33">}</text:span></text:span><text:span text:style-name="T7"/></text:p>
      <text:p text:style-name="P11"><text:span text:style-name="Source_20_Text"/></text:p>
      <text:p text:style-name="P11"><text:span text:style-name="T21">Realizamos o </text:span><text:span text:style-name="Emphasis"><text:span text:style-name="T22">commit</text:span></text:span><text:span text:style-name="T21">, inserimos o </text:span><text:span text:style-name="Emphasis"><text:span text:style-name="T22">reset </text:span></text:span><text:span text:style-name="T21">inicialmente, criamos o </text:span><text:span text:style-name="Source_20_Text"><text:span text:style-name="T24">index</text:span></text:span><text:span text:style-name="T21">, a pasta "img", e isso é o necessário para começarmos a fazer configurações mais avançadas. Estamos no curso de Responsividade no Terminal, e vamos entrar na pasta do "Jornada Viagens" usando o comando </text:span><text:span text:style-name="Source_20_Text"><text:span text:style-name="T24">cd</text:span></text:span><text:span text:style-name="T21">.</text:span><text:span text:style-name="T7"/></text:p>
      <text:p text:style-name="P26"><text:span text:style-name="Source_20_Text"><text:span text:style-name="T35">cd</text:span></text:span><text:span text:style-name="Source_20_Text"><text:span text:style-name="T33"> jornada-viagens</text:span></text:span><text:span text:style-name="T7"/></text:p>
      <text:p text:style-name="P11"><text:span text:style-name="Source_20_Text"/></text:p>
      <text:p text:style-name="P11"><text:span text:style-name="T21">Adicionamos todos os arquivos com </text:span><text:span text:style-name="Source_20_Text"><text:span text:style-name="T24">git add . </text:span></text:span><text:span text:style-name="T21">e realizamos o </text:span><text:span text:style-name="Emphasis"><text:span text:style-name="T22">commit </text:span></text:span><text:span text:style-name="T21">com a mensagem apropriada.</text:span><text:span text:style-name="T7"/></text:p>
      <text:p text:style-name="P28"><text:span text:style-name="Source_20_Text"><text:span text:style-name="T33">git add .</text:span></text:span><text:span text:style-name="T7"/></text:p>
      <text:p text:style-name="P30"><text:span text:style-name="Source_20_Text"><text:span text:style-name="T33">git commit -m </text:span></text:span><text:span text:style-name="Source_20_Text"><text:span text:style-name="T35">"Adiciona configuração inicial do projeto"</text:span></text:span><text:span text:style-name="T7"/></text:p>
      <text:h text:style-name="P23" text:outline-level="2"><text:span text:style-name="T28">Verificando o repositório e corrigindo a estrutura de pastas</text:span><text:span text:style-name="T7"/></text:h>
      <text:p text:style-name="P11"><text:span text:style-name="T21">Este primeiro </text:span><text:span text:style-name="Emphasis"><text:span text:style-name="T22">commit </text:span></text:span><text:span text:style-name="T21">foi feito na </text:span><text:span text:style-name="Emphasis"><text:span text:style-name="T22">branch </text:span></text:span><text:span text:style-name="Source_20_Text"><text:span text:style-name="T24">main</text:span></text:span><text:span text:style-name="T21">, o que não é um problema. O </text:span><text:span text:style-name="Emphasis"><text:span text:style-name="T22">setup </text:span></text:span><text:span text:style-name="T21">inicial pode ser feito na </text:span><text:span text:style-name="Emphasis"><text:span text:style-name="T22">branch </text:span></text:span><text:span text:style-name="Source_20_Text"><text:span text:style-name="T24">main</text:span></text:span><text:span text:style-name="T21">, especialmente porque o projeto ainda não foi publicado. Quando o projeto for publicado ou quando realmente começarmos o desenvolvimento, criaremos as </text:span><text:span text:style-name="Emphasis"><text:span text:style-name="T22">branches </text:span></text:span><text:span text:style-name="T21">adequadas.</text:span><text:span text:style-name="T7"/></text:p>
      <text:p text:style-name="P11"><text:span text:style-name="T21">Após o </text:span><text:span text:style-name="Emphasis"><text:span text:style-name="T22">commit</text:span></text:span><text:span text:style-name="T21">, realizamos o </text:span><text:span text:style-name="Source_20_Text"><text:span text:style-name="T24">git push </text:span></text:span><text:span text:style-name="T21">e verificamos no GitHub se tudo foi atualizado.</text:span><text:span text:style-name="T7"/></text:p>
      <text:p text:style-name="P26"><text:span text:style-name="Source_20_Text"><text:span text:style-name="T33">git push</text:span></text:span><text:span text:style-name="T7"/></text:p>
      <text:p text:style-name="P11"><text:span text:style-name="Source_20_Text"/></text:p>
      <text:p text:style-name="P11"><text:span text:style-name="T21">Os arquivos apareceram lá, e atualizamos a página do repositório. Tudo está certo até agora. Adicionamos a configuração inicial do projeto, o </text:span><text:span text:style-name="Source_20_Text"><text:span text:style-name="T24">index</text:span></text:span><text:span text:style-name="T21">, o CSS, mas a pasta "img" não apareceu. Verificamos o que aconteceu e percebemos que a pasta "img" estava dentro da pasta "css". Precisamos movê-la para fora, para dentro da pasta "Jornada Viagens", para que fique no mesmo nível. Adicionamos novamente com </text:span><text:span text:style-name="Source_20_Text"><text:span text:style-name="T24">git add </text:span></text:span><text:span text:style-name="T21">e realizamos o </text:span><text:span text:style-name="Emphasis"><text:span text:style-name="T22">commit </text:span></text:span><text:span text:style-name="T21">com a mensagem apropriada.</text:span><text:span text:style-name="T7"/></text:p>
      <text:p text:style-name="P29"><text:span text:style-name="Source_20_Text"><text:span text:style-name="T33">git add .</text:span></text:span><text:span text:style-name="T7"/></text:p>
      <text:p text:style-name="P30"><text:span text:style-name="Source_20_Text"><text:span text:style-name="T33">git commit -m </text:span></text:span><text:span text:style-name="Source_20_Text"><text:span text:style-name="T35">"Adiciona pasta img"</text:span></text:span><text:span text:style-name="T7"/></text:p>
      <text:h text:style-name="P23" text:outline-level="2"><text:span text:style-name="T28">Lidando com pastas vazias e finalizando a configuração inicial</text:span><text:span text:style-name="T7"/></text:h>
      <text:p text:style-name="P11"><text:span text:style-name="T21">Interessantemente, tentamos comitar uma </text:span><text:span text:style-name="T26">pasta vazia</text:span><text:span text:style-name="T21">. Mesmo após mover a pasta para a raiz do projeto, tentamos comitar uma pasta sem arquivos. O </text:span><text:span text:style-name="T26">Git e o GitHub não aceitam</text:span><text:span text:style-name="T21"> </text:span><text:span text:style-name="Emphasis"><text:span text:style-name="T22">commit </text:span></text:span><text:span text:style-name="T21">de pastas vazias. Se precisarmos comitar uma pasta vazia, devemos incluir um arquivo com a extensão </text:span><text:span text:style-name="Source_20_Text"><text:span text:style-name="T24">.gitkeep</text:span></text:span><text:span text:style-name="T21">. No entanto, não </text:span><text:soft-page-break/><text:span text:style-name="T21">temos essa necessidade agora, pois era apenas para facilitar o </text:span><text:span text:style-name="Emphasis"><text:span text:style-name="T22">setup </text:span></text:span><text:span text:style-name="T21">inicial. O terminal nos avisou que não há nada para comitar. Quando adicionarmos arquivos de imagem nessa pasta, poderemos comitá-la normalmente.</text:span><text:span text:style-name="T7"/></text:p>
      <text:p text:style-name="P11"><text:span text:style-name="T21">Concluímos a configuração inicial. Criamos o repositório no GitHub, o projeto, o </text:span><text:span text:style-name="Source_20_Text"><text:span text:style-name="T24">index </text:span></text:span><text:span text:style-name="T21">e o CSS. </text:span><text:span text:style-name="T25">C</text:span><text:span text:style-name="T21">omeçaremos a fazer as configurações globais do projeto. Fizemos o </text:span><text:span text:style-name="Emphasis"><text:span text:style-name="T22">setup </text:span></text:span><text:span text:style-name="T21">básico e passaremos para uma configuração global. </text:span><text:span text:style-name="T7"/></text:p>
      <text:p text:style-name="P14"/>
      <text:h text:style-name="P17" text:outline-level="1"><text:span text:style-name="T48">06Para saber mais: sincronização entre repositórios no git</text:span></text:h>
      <text:h text:style-name="P25" text:outline-level="2"><text:span text:style-name="T31">Entendendo os Ambientes</text:span></text:h>
      <text:p text:style-name="P46">No Git, trabalhamos com <text:span text:style-name="T49">dois ambientes</text:span> principais: o repositório <text:span text:style-name="T49">local</text:span> e o repositório <text:span text:style-name="T49">remoto</text:span>. O repositório local é aquele presente na sua máquina, onde você realiza modificações, cria commits e testa novas funcionalidades. Já o <text:span text:style-name="T49">repositório remoto</text:span>, geralmente <text:span text:style-name="T49">hospedado em serviços</text:span> como o GitHub, serve como uma <text:span text:style-name="T49">fonte central</text:span> para armazenar e compartilhar o código com a equipe. Essa separação permite que cada colaborador trabalhe de forma isolada e, depois, sincronize as alterações com o repositório remoto.</text:p>
      <text:h text:style-name="P20" text:outline-level="2">Funcionamento do Git Push</text:h>
      <text:p text:style-name="P65"><text:span text:style-name="T22">O comando </text:span><text:span text:style-name="Source_20_Text"><text:span text:style-name="T24">git push </text:span></text:span><text:span text:style-name="T22">é utilizado para </text:span><text:span text:style-name="T27">enviar</text:span><text:span text:style-name="T22"> os commits realizados no seu repositório local para o repositório remoto. Quando você executa este comando, o Git compara a branch local com a sua contraparte no repositório remoto. Se a branch local tiver commits que ainda não foram enviados, o </text:span><text:span text:style-name="Source_20_Text"><text:span text:style-name="T24">push </text:span></text:span><text:span text:style-name="T22">finaliza essa sincronização. Em situações em que as alterações conflitam com o que já está no remoto, o Git alertará para a necessidade de atualizar seu repositório local antes de enviar novas modificações.</text:span></text:p>
      <text:p text:style-name="P46">Um exemplo básico de uso é:</text:p>
      <text:p text:style-name="P32"><text:span text:style-name="Source_20_Text"><text:span text:style-name="T54"># Envia os commits da branch atual para a branch 'main' do origin</text:span></text:span></text:p>
      <text:p text:style-name="P31"><text:span text:style-name="Source_20_Text"><text:span text:style-name="T33">$ git push origin main</text:span></text:span></text:p>
      <text:p text:style-name="P47"/>
      <text:h text:style-name="P21" text:outline-level="2">Rastreamento e Fluxo de Trabalho</text:h>
      <text:p text:style-name="P66"><text:span text:style-name="T21">Para facilitar a sincronização, o Git permite que uma branch local seja configurada para rastrear uma branch remota. Isso significa que os comandos </text:span><text:span text:style-name="Source_20_Text"><text:span text:style-name="T24">git pull </text:span></text:span><text:span text:style-name="T21">(para atualizar o repositório local) e </text:span><text:span text:style-name="Source_20_Text"><text:span text:style-name="T24">git push </text:span></text:span><text:span text:style-name="T21">(para enviar alterações) podem ser executados sem a necessidade de especificar sempre o nome do repositório e da branch.</text:span></text:p>
      <text:p text:style-name="P66"><text:span text:style-name="T21">Durante um fluxo de trabalho típico, após realizar modificações e criar commits, você utilizará o </text:span><text:span text:style-name="Source_20_Text"><text:span text:style-name="T24">git push </text:span></text:span><text:span text:style-name="T21">para manter o repositório remoto atualizado. Esse mecanismo de sincronização garante que haja um histórico compartilhado e que cada colaborador esteja sempre trabalhando com a versão mais recente do projeto.</text:span></text:p>
      <text:p text:style-name="P51">Essa estratégia de sincronização é fundamental para equipes que trabalham de forma colaborativa, pois permite organização, rastreabilidade das alterações e um controle centralizado do código.</text:p>
      <text:p text:style-name="P51"/>
      <text:p text:style-name="P51"/>
      <text:p text:style-name="P51"/>
      <text:p text:style-name="P51"/>
      <text:p text:style-name="P53"><text:soft-page-break/>2. Aplicando mobili first, flexbox e boas práticas</text:p>
      <text:p text:style-name="P53"/>
      <text:p text:style-name="P54">Configurações globais de CSS: cores</text:p>
      <text:p text:style-name="P48">Vamos iniciar a configuração de algumas definições globais em nosso projeto. Já estruturamos a base e agora vamos realizar essas configurações para evitar a necessidade de retornar frequentemente ao Figma para consulta. Começaremos pelas <text:span text:style-name="T49">cores</text:span>, nomeando-as para facilitar seu uso. Vamos <text:span text:style-name="T49">criar</text:span> uma <text:span text:style-name="Emphasis"><text:span text:style-name="T49">branch</text:span></text:span><text:span text:style-name="Emphasis"> </text:span>para trabalhar nisso: </text:p>
      <text:p text:style-name="P35"><text:span text:style-name="Source_20_Text"><text:span text:style-name="T33">git checkout -b feat/adiciona-variaveis-de-cores</text:span></text:span></text:p>
      <text:p text:style-name="P63"><text:span text:style-name="T6">Teremos cores de fundo, de botões e de textos. Essa divisão é importante. Antes do nosso </text:span><text:span text:style-name="Emphasis"><text:span text:style-name="T13">CSS reset</text:span></text:span><text:span text:style-name="T6">, criaremos uma </text:span><text:span text:style-name="T12">pseudoclasse</text:span><text:span text:style-name="T6"> chamada</text:span><text:span text:style-name="Source_20_Text"><text:span text:style-name="T14">: root</text:span></text:span><text:span text:style-name="T6">. O que é</text:span><text:span text:style-name="Source_20_Text"><text:span text:style-name="T14">: root</text:span></text:span><text:span text:style-name="T6">? É a </text:span><text:span text:style-name="T12">raiz</text:span><text:span text:style-name="T6">, onde definiremos </text:span><text:span text:style-name="Emphasis"><text:span text:style-name="T13">custom properties</text:span></text:span><text:span text:style-name="T6">(propriedades personalizadas) de CSS. Elas são personalizadas porque nomeamos essas propriedades, ao contrário das propriedades genéricas já existentes no CSS. Por exemplo, ao falar de cores de fundo, podemos usar –</text:span><text:span text:style-name="Source_20_Text"><text:span text:style-name="T14">background-primary-color </text:span></text:span><text:span text:style-name="T6">para indicar a cor primária de fundo.</text:span></text:p>
      <text:h text:style-name="P19" text:outline-level="2">Definindo variáveis de cores de fundo</text:h>
      <text:p text:style-name="P15"><text:span text:style-name="T21">Vamos começar definindo a estrutura básica para as variáveis de CSS dentro da pseudoclasse </text:span><text:span text:style-name="Source_20_Text"><text:span text:style-name="T24">:root</text:span></text:span><text:span text:style-name="T21">:</text:span></text:p>
      <text:p text:style-name="P37"><text:span text:style-name="Source_20_Text"><text:span text:style-name="T35">:root</text:span></text:span><text:span text:style-name="Source_20_Text"><text:span text:style-name="T33"> {</text:span></text:span></text:p>
      <text:p text:style-name="P30"><text:span text:style-name="Source_20_Text"><text:span text:style-name="T34"><text:s text:c="4"/></text:span></text:span><text:span text:style-name="Source_20_Text"><text:span text:style-name="T40">--background-primary-color</text:span></text:span><text:span text:style-name="Source_20_Text"><text:span text:style-name="T33">: </text:span></text:span><text:span text:style-name="Source_20_Text"><text:span text:style-name="T40">#ffffff</text:span></text:span><text:span text:style-name="Source_20_Text"><text:span text:style-name="T33">;</text:span></text:span></text:p>
      <text:p text:style-name="P30"><text:span text:style-name="Source_20_Text"><text:span text:style-name="T34"><text:s text:c="4"/></text:span></text:span><text:span text:style-name="Source_20_Text"><text:span text:style-name="T40">--background-secondary-color</text:span></text:span><text:span text:style-name="Source_20_Text"><text:span text:style-name="T33">: </text:span></text:span><text:span text:style-name="Source_20_Text"><text:span text:style-name="T40">#f5f5f5</text:span></text:span><text:span text:style-name="Source_20_Text"><text:span text:style-name="T33">;</text:span></text:span></text:p>
      <text:p text:style-name="P30"><text:span text:style-name="Source_20_Text"><text:span text:style-name="T34"><text:s text:c="4"/></text:span></text:span><text:span text:style-name="Source_20_Text"><text:span text:style-name="T40">--background-tertiary-color</text:span></text:span><text:span text:style-name="Source_20_Text"><text:span text:style-name="T33">: </text:span></text:span><text:span text:style-name="Source_20_Text"><text:span text:style-name="T40">#000000</text:span></text:span><text:span text:style-name="Source_20_Text"><text:span text:style-name="T33">;</text:span></text:span></text:p>
      <text:p text:style-name="P31"><text:span text:style-name="Source_20_Text"><text:span text:style-name="T33">}</text:span></text:span></text:p>
      <text:p text:style-name="P15"><text:span text:style-name="T21"/></text:p>
      <text:p text:style-name="P68"><text:span text:style-name="T21">No projeto, temos diferentes fundos: o menu possui fundo preto, o site em si tem fundo branco, e os itens de categoria têm fundo cinza. O fundo é a cor de fundo dos elementos, alterada pela propriedade </text:span><text:span text:style-name="Source_20_Text"><text:span text:style-name="T24">background-color</text:span></text:span><text:span text:style-name="T21">. Por isso, estamos definindo essa nomenclatura. Temos o preto, um cinza claro (off-white) e o branco do projeto. Usaremos </text:span><text:span text:style-name="Source_20_Text"><text:span text:style-name="T24">--background-primary-color</text:span></text:span><text:span text:style-name="T21"> para o branco, que é o </text:span><text:span text:style-name="Source_20_Text"><text:span text:style-name="T24">#FFFFFF</text:span></text:span><text:span text:style-name="T21">. O secundário, que é o cinza </text:span><text:span text:style-name="Source_20_Text"><text:span text:style-name="T24">#F5F5F5</text:span></text:span><text:span text:style-name="T21">, será chamado de off-white. O terciário, que é o preto do menu, será </text:span><text:span text:style-name="Source_20_Text"><text:span text:style-name="T24">#000000</text:span></text:span><text:span text:style-name="T21">.</text:span></text:p>
      <text:h text:style-name="P19" text:outline-level="2">Definindo variáveis de cores de botões</text:h>
      <text:p text:style-name="P50">Após definir as cores de fundo, passaremos para as cores dos botões:</text:p>
      <text:p text:style-name="P36"><text:span text:style-name="Source_20_Text"><text:span text:style-name="T35">:root</text:span></text:span><text:span text:style-name="Source_20_Text"><text:span text:style-name="T33"> {</text:span></text:span></text:p>
      <text:p text:style-name="P30"><text:span text:style-name="Source_20_Text"><text:span text:style-name="T34"><text:s text:c="4"/></text:span></text:span><text:span text:style-name="Source_20_Text"><text:span text:style-name="T40">--button-primary-color</text:span></text:span><text:span text:style-name="Source_20_Text"><text:span text:style-name="T33">: </text:span></text:span><text:span text:style-name="Source_20_Text"><text:span text:style-name="T40">#BF0101</text:span></text:span><text:span text:style-name="Source_20_Text"><text:span text:style-name="T33">;</text:span></text:span></text:p>
      <text:p text:style-name="P30"><text:span text:style-name="Source_20_Text"><text:span text:style-name="T34"><text:s text:c="4"/></text:span></text:span><text:span text:style-name="Source_20_Text"><text:span text:style-name="T40">--button-secondary-color</text:span></text:span><text:span text:style-name="Source_20_Text"><text:span text:style-name="T33">: </text:span></text:span><text:span text:style-name="Source_20_Text"><text:span text:style-name="T40">#B81515</text:span></text:span><text:span text:style-name="Source_20_Text"><text:span text:style-name="T33">;</text:span></text:span></text:p>
      <text:p text:style-name="P31"><text:span text:style-name="Source_20_Text"><text:span text:style-name="T33">}</text:span></text:span></text:p>
      <text:p text:style-name="P61"><text:span text:style-name="T6"/></text:p>
      <text:p text:style-name="P63"><text:span text:style-name="T6">A cor principal dos botões será um vermelho escuro, e a secundária, usada no </text:span><text:span text:style-name="Emphasis"><text:span text:style-name="T17">hover</text:span></text:span><text:span text:style-name="T6">, será um vermelho claro. </text:span></text:p>
      <text:h text:style-name="P22" text:outline-level="2">Definindo variáveis de cores de texto</text:h>
      <text:p text:style-name="P50">Por fim, definiremos as cores de texto:</text:p>
      <text:p text:style-name="P34"><text:span text:style-name="Source_20_Text"><text:span text:style-name="T55">:root</text:span></text:span><text:span text:style-name="Source_20_Text"><text:span text:style-name="T52"> {</text:span></text:span></text:p>
      <text:p text:style-name="P30"><text:span text:style-name="Source_20_Text"><text:span text:style-name="T34"><text:s text:c="4"/></text:span></text:span><text:span text:style-name="Source_20_Text"><text:span text:style-name="T40">--text-primary-color</text:span></text:span><text:span text:style-name="Source_20_Text"><text:span text:style-name="T33">: </text:span></text:span><text:span text:style-name="Source_20_Text"><text:span text:style-name="T40">#222222</text:span></text:span><text:span text:style-name="Source_20_Text"><text:span text:style-name="T33">;</text:span></text:span></text:p>
      <text:p text:style-name="P30"><text:span text:style-name="Source_20_Text"><text:span text:style-name="T34"><text:s text:c="4"/></text:span></text:span><text:span text:style-name="Source_20_Text"><text:span text:style-name="T40">--text-secondary-color</text:span></text:span><text:span text:style-name="Source_20_Text"><text:span text:style-name="T33">: </text:span></text:span><text:span text:style-name="Source_20_Text"><text:span text:style-name="T40">#FFFFFF</text:span></text:span><text:span text:style-name="Source_20_Text"><text:span text:style-name="T33">;</text:span></text:span></text:p>
      <text:p text:style-name="P31"><text:soft-page-break/><text:span text:style-name="Source_20_Text"><text:span text:style-name="T33">}</text:span></text:span></text:p>
      <text:p text:style-name="P52"/>
      <text:p text:style-name="P49">No projeto, a maioria dos textos utiliza uma cor grafite, que é <text:span text:style-name="Source_20_Text"><text:span text:style-name="T5">#222222</text:span></text:span>, e será nossa cor primária. A segunda cor mais utilizada é o branco. Vamos verificar as cores dos textos no projeto para garantir que todas as variações estejam corretamente definidas.</text:p>
      <text:h text:style-name="P19" text:outline-level="2">Testando e aplicando variáveis de cores</text:h>
      <text:p text:style-name="P50">As cores que estão em branco nos cartões e adicionais são as cores secundárias. Essas são as cores do texto. Temos apenas dois botões, sem três variações de texto. Declaramos aqui as variáveis. Vamos voltar ao HTML para entender como usá-las e por que as criamos.</text:p>
      <text:p text:style-name="P15"><text:span text:style-name="T21">Vamos inserir um </text:span><text:span text:style-name="Source_20_Text"><text:span text:style-name="T24">H1 </text:span></text:span><text:span text:style-name="T21">com o texto "Teste de cores" e ativar o </text:span><text:span text:style-name="Emphasis"><text:span text:style-name="T22">live server</text:span></text:span><text:span text:style-name="T21">. O texto aparece em preto. Para usar nossa variável, declaramos um </text:span><text:span text:style-name="Source_20_Text"><text:span text:style-name="T24">H1 </text:span></text:span><text:span text:style-name="T21">e utilizamos a propriedade </text:span><text:span text:style-name="Source_20_Text"><text:span text:style-name="T24">color </text:span></text:span><text:span text:style-name="T21">com a sintaxe </text:span><text:span text:style-name="Source_20_Text"><text:span text:style-name="T24">var</text:span></text:span><text:span text:style-name="T21">, passando o nome que criamos. Por exemplo, </text:span><text:span text:style-name="Source_20_Text"><text:span text:style-name="T24">text-primary-color</text:span></text:span><text:span text:style-name="T21">.</text:span></text:p>
      <text:p text:style-name="P37"><text:span text:style-name="Source_20_Text"><text:span text:style-name="T38">&lt;h1&gt;</text:span></text:span><text:span text:style-name="Source_20_Text"><text:span text:style-name="T33">Teste de cores</text:span></text:span><text:span text:style-name="Source_20_Text"><text:span text:style-name="T38">&lt;/h1&gt;</text:span></text:span></text:p>
      <text:p text:style-name="P15"><text:span text:style-name="T21"/></text:p>
      <text:p text:style-name="P37"><text:span text:style-name="Source_20_Text"><text:span text:style-name="T39">h1</text:span></text:span><text:span text:style-name="Source_20_Text"><text:span text:style-name="T33"> {</text:span></text:span></text:p>
      <text:p text:style-name="P30"><text:span text:style-name="Source_20_Text"><text:span text:style-name="T34"><text:s text:c="4"/></text:span></text:span><text:span text:style-name="Source_20_Text"><text:span text:style-name="T41">color</text:span></text:span><text:span text:style-name="Source_20_Text"><text:span text:style-name="T33">: </text:span></text:span><text:span text:style-name="Source_20_Text"><text:span text:style-name="T35">var</text:span></text:span><text:span text:style-name="Source_20_Text"><text:span text:style-name="T33">(--button-primary-color);</text:span></text:span></text:p>
      <text:p text:style-name="P31"><text:span text:style-name="Source_20_Text"><text:span text:style-name="T33">}</text:span></text:span></text:p>
      <text:p text:style-name="P60"><text:span text:style-name="T7"/></text:p>
      <text:p text:style-name="P67"><text:span text:style-name="T21">Ao digitar um traço, todas as variáveis criadas aparecem, facilitando a navegação na seleção de cores. Vamos testar colocando </text:span><text:span text:style-name="Source_20_Text"><text:span text:style-name="T32">button-primary-color</text:span></text:span><text:span text:style-name="Source_20_Text"><text:span text:style-name="T24"> </text:span></text:span><text:span text:style-name="T21">para obter uma cor vermelha diferente. No projeto, nada acontece porque ainda não vinculamos o CSS ao </text:span><text:span text:style-name="Source_20_Text"><text:span text:style-name="T32">index</text:span></text:span><text:span text:style-name="T21">. Vamos fazer isso agora:</text:span><text:span text:style-name="T20"> </text:span></text:p>
      <text:p text:style-name="P38"><text:span text:style-name="Source_20_Text"><text:span text:style-name="T38">&lt;link </text:span></text:span><text:span text:style-name="Source_20_Text"><text:span text:style-name="T40">rel</text:span></text:span><text:span text:style-name="Source_20_Text"><text:span text:style-name="T38">=</text:span></text:span><text:span text:style-name="Source_20_Text"><text:span text:style-name="T35">"stylesheet"</text:span></text:span><text:span text:style-name="Source_20_Text"><text:span text:style-name="T38"> </text:span></text:span><text:span text:style-name="Source_20_Text"><text:span text:style-name="T40">href</text:span></text:span><text:span text:style-name="Source_20_Text"><text:span text:style-name="T38">=</text:span></text:span><text:span text:style-name="Source_20_Text"><text:span text:style-name="T35">"./css/style.css"</text:span></text:span><text:span text:style-name="Source_20_Text"><text:span text:style-name="T38">&gt;</text:span></text:span></text:p>
      <text:p text:style-name="P61"><text:span text:style-name="T6"/></text:p>
      <text:p text:style-name="P49">Agora, ao voltar ao projeto, a cor já mudou. </text:p>
      <text:h text:style-name="P22" text:outline-level="2"><text:span text:style-name="T60">Vantagens</text:span> de usar<text:span text:style-name="T59"> variáveis CSS</text:span></text:h>
      <text:p text:style-name="P6">Por que é vantajoso usar variáveis no arquivo CSS? Imagine que, em algum momento, haverá uma campanha e o site precisará trocar todas as cores. Se não tivéssemos variáveis, teríamos que alterar cada elemento individualmente. Usando variáveis CSS, podemos simplesmente mudar a cor principal para amarelo e a secundária para laranja, por exemplo:</text:p>
      <text:p text:style-name="P33"><text:span text:style-name="Source_20_Text"><text:span text:style-name="T56">:root</text:span></text:span><text:span text:style-name="Source_20_Text"><text:span text:style-name="T53"> {</text:span></text:span></text:p>
      <text:p text:style-name="P30"><text:span text:style-name="Source_20_Text"><text:span text:style-name="T34"><text:s text:c="4"/></text:span></text:span><text:span text:style-name="Source_20_Text"><text:span text:style-name="T40">--button-primary-color</text:span></text:span><text:span text:style-name="Source_20_Text"><text:span text:style-name="T33">: yellow;</text:span></text:span></text:p>
      <text:p text:style-name="P30"><text:span text:style-name="Source_20_Text"><text:span text:style-name="T34"><text:s text:c="4"/></text:span></text:span><text:span text:style-name="Source_20_Text"><text:span text:style-name="T40">--button-secondary-color</text:span></text:span><text:span text:style-name="Source_20_Text"><text:span text:style-name="T33">: orange;</text:span></text:span></text:p>
      <text:p text:style-name="P31"><text:span text:style-name="Source_20_Text"><text:span text:style-name="T33">}</text:span></text:span></text:p>
      <text:p text:style-name="P49"/>
      <text:p text:style-name="P62"><text:span text:style-name="T7">Todos os elementos que usam </text:span><text:span text:style-name="Source_20_Text"><text:span text:style-name="T9">button-primary-color </text:span></text:span><text:span text:style-name="T7">e </text:span><text:span text:style-name="Source_20_Text"><text:span text:style-name="T9">button-secondary-color </text:span></text:span><text:span text:style-name="T7">já ficarão amarelos e laranjas. Assim, modificamos apenas em um lugar.</text:span></text:p>
      <text:h text:style-name="P24" text:outline-level="2"><text:span text:style-name="T19">Finalizando e comitando alterações</text:span></text:h>
      <text:p text:style-name="P15"><text:span text:style-name="T21">Vamos remover o </text:span><text:span text:style-name="Source_20_Text"><text:span text:style-name="T24">H1 </text:span></text:span><text:span text:style-name="T21">que usamos para teste e os comentários desnecessários, pois nomeamos corretamente nossas variáveis. As cores de fundo, botão e texto estão claras. No </text:span><text:span text:style-name="Source_20_Text"><text:span text:style-name="T24">index</text:span></text:span><text:span text:style-name="T21">, deixaremos apenas o link do CSS que fizemos. Vamos comitar:</text:span></text:p>
      <text:p text:style-name="P37"><text:soft-page-break/><text:span text:style-name="Source_20_Text"><text:span text:style-name="T33">git add .</text:span></text:span></text:p>
      <text:p text:style-name="P30"><text:span text:style-name="Source_20_Text"><text:span text:style-name="T33">git commit -m </text:span></text:span><text:span text:style-name="Source_20_Text"><text:span text:style-name="T35">"Adiciona variáveis de cores"</text:span></text:span></text:p>
      <text:p text:style-name="P60"><text:span text:style-name="T7"/></text:p>
      <text:p text:style-name="P39"><text:span text:style-name="T6">Corrigimos o uso de acentos, seguindo boas práticas. Após isso, seguimos o processo normalmente: abrimos a PR, fazemos o </text:span><text:span text:style-name="Emphasis"><text:span text:style-name="T3">merge</text:span></text:span><text:span text:style-name="T6">. No próximo vídeo, vamos criar variáveis de texto e fontes. Até já!</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28T15:47:39.542000000</meta:creation-date>
    <dc:date>2026-05-05T15:25:33.559000000</dc:date>
    <meta:editing-duration>P6DT23H13M43S</meta:editing-duration>
    <meta:editing-cycles>10</meta:editing-cycles>
    <meta:generator>LibreOffice/7.5.0.3$Windows_X86_64 LibreOffice_project/c21113d003cd3efa8c53188764377a8272d9d6de</meta:generator>
    <meta:document-statistic meta:table-count="0" meta:image-count="0" meta:object-count="0" meta:page-count="9" meta:paragraph-count="155" meta:word-count="3157" meta:character-count="20178" meta:non-whitespace-character-count="17118"/>
  </office:meta>
</office:document-meta>
</file>